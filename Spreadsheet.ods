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300000011606A6C1C.png" manifest:media-type="image/png"/>
  <manifest:file-entry manifest:full-path="Pictures/100000010000001900000010C1D3B478.png" manifest:media-type="image/png"/>
  <manifest:file-entry manifest:full-path="Pictures/10000001000000220000000EAB310434.png" manifest:media-type="image/png"/>
  <manifest:file-entry manifest:full-path="Pictures/100000010000002300000013C77DDD5D.png" manifest:media-type="image/png"/>
  <manifest:file-entry manifest:full-path="Pictures/100000010000000E0000000E4E146B4D.png" manifest:media-type="image/png"/>
  <manifest:file-entry manifest:full-path="Pictures/1000000100000014000000169FD8A796.png" manifest:media-type="image/png"/>
  <manifest:file-entry manifest:full-path="Pictures/100000010000000E0000001050304E56.png" manifest:media-type="image/png"/>
  <manifest:file-entry manifest:full-path="Pictures/100000010000001200000012DFD8CF81.png" manifest:media-type="image/png"/>
  <manifest:file-entry manifest:full-path="Pictures/100000010000001E00000014C99D5F1E.png" manifest:media-type="image/png"/>
  <manifest:file-entry manifest:full-path="Pictures/100000010000001A00000014C4FF9780.png" manifest:media-type="image/png"/>
  <manifest:file-entry manifest:full-path="Pictures/20000009000009EC000008A43AF4CB4D.svm" manifest:media-type="image/x-svm"/>
  <manifest:file-entry manifest:full-path="Pictures/10000001000000180000001094DFF98C.png" manifest:media-type="image/png"/>
  <manifest:file-entry manifest:full-path="Pictures/10000001000000240000001099C924C4.png" manifest:media-type="image/png"/>
  <manifest:file-entry manifest:full-path="Pictures/100000010000001200000010D21DB74C.png" manifest:media-type="image/png"/>
  <manifest:file-entry manifest:full-path="Pictures/100000010000001200000010E8F7B126.png" manifest:media-type="image/png"/>
  <manifest:file-entry manifest:full-path="Pictures/10000001000000180000001076725A5E.png" manifest:media-type="image/png"/>
  <manifest:file-entry manifest:full-path="Pictures/1000000100000061000000557C9F5670.png" manifest:media-type="image/png"/>
  <manifest:file-entry manifest:full-path="Pictures/100000010000001E000000149BEE70FA.png" manifest:media-type="image/png"/>
  <manifest:file-entry manifest:full-path="Pictures/100000010000001000000010B1E1AE33.png" manifest:media-type="image/png"/>
  <manifest:file-entry manifest:full-path="Pictures/1000000100000022000000075CD6957F.png" manifest:media-type="image/png"/>
  <manifest:file-entry manifest:full-path="Pictures/20000009000009EC000007251C43EC56.svm" manifest:media-type="image/x-svm"/>
  <manifest:file-entry manifest:full-path="Pictures/10000001000000610000004684E6C66E.png" manifest:media-type="image/png"/>
  <manifest:file-entry manifest:full-path="Pictures/10000001000000240000001055CD21DF.png" manifest:media-type="image/png"/>
  <manifest:file-entry manifest:full-path="Pictures/100000010000001000000010958C2BE0.png" manifest:media-type="image/png"/>
  <manifest:file-entry manifest:full-path="Pictures/1000000100000016000000169EFC10B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221cm"/>
    </style:style>
    <style:style style:name="co5" style:family="table-column">
      <style:table-column-properties fo:break-before="auto" style:column-width="7.803cm"/>
    </style:style>
    <style:style style:name="co6" style:family="table-column">
      <style:table-column-properties fo:break-before="auto" style:column-width="5.37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1" number:language="en" number:country="GB">
      <number:number number:decimal-places="0" number:min-decimal-places="0" number:min-integer-digits="1"/>
    </number:number-style>
    <number:number-style style:name="N10002" number:language="en" number:country="GB">
      <number:number number:decimal-places="2" number:min-decimal-places="2"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number:percentage-style style:name="N10011" number:language="en" number:country="GB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10000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4" style:family="table-cell" style:parent-style-name="Default" style:data-style-name="N10000">
      <style:text-properties style:font-name="Liberation Sans" fo:language="en" fo:country="US"/>
    </style:style>
    <style:style style:name="ce11" style:family="table-cell" style:parent-style-name="Default" style:data-style-name="N10000">
      <style:text-properties style:font-name="Liberation Sans"/>
    </style:style>
    <style:style style:name="ce15" style:family="table-cell" style:parent-style-name="Default" style:data-style-name="N10000">
      <style:table-cell-properties style:text-align-source="fix" style:repeat-content="false" style:vertical-align="middle"/>
      <style:paragraph-properties fo:text-align="start" fo:margin-left="0cm"/>
      <style:text-properties style:font-name="Liberation Sans" fo:language="en" fo:country="US" fo:font-weight="bold" style:font-weight-asian="bold" style:font-weight-complex="bold"/>
    </style:style>
    <style:style style:name="ce19" style:family="table-cell" style:parent-style-name="Default" style:data-style-name="N10000">
      <style:table-cell-properties style:text-align-source="fix" style:repeat-content="false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0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2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 style:data-style-name="N10000">
      <style:text-properties style:font-name="Liberation Sans" fo:font-weight="bold" style:font-weight-asian="bold" style:font-weight-complex="bold"/>
    </style:style>
    <style:style style:name="ce22" style:family="table-cell" style:parent-style-name="Default" style:data-style-name="N20130">
      <style:text-properties style:font-name="Liberation Sans"/>
    </style:style>
    <style:style style:name="ce23" style:family="table-cell" style:parent-style-name="Default" style:data-style-name="N20129">
      <style:text-properties style:font-name="Liberation Sans"/>
    </style:style>
    <style:style style:name="ce18" style:family="table-cell" style:parent-style-name="Default" style:data-style-name="N10124"/>
    <style:style style:name="ce24" style:family="table-cell" style:parent-style-name="Default" style:data-style-name="N10010">
      <style:text-properties style:font-name="Liberation Sans"/>
    </style:style>
    <style:style style:name="ce25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" style:family="table-cell" style:parent-style-name="Default" style:data-style-name="N10119">
      <style:text-properties style:font-name="Liberation Sans"/>
    </style:style>
    <style:style style:name="ce34" style:family="table-cell" style:parent-style-name="Default" style:data-style-name="N10000"/>
    <style:style style:name="ce29" style:family="table-cell" style:parent-style-name="Default" style:data-style-name="N10011">
      <style:text-properties style:font-name="Liberation Sans"/>
    </style:style>
    <style:style style:name="ce26" style:family="table-cell" style:parent-style-name="Default" style:data-style-name="N10000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27" style:family="table-cell" style:parent-style-name="Default" style:data-style-name="N10000">
      <style:table-cell-properties style:vertical-align="automatic"/>
      <style:text-properties style:font-name="Liberation Sans"/>
    </style:style>
    <style:style style:name="ce30" style:family="table-cell" style:parent-style-name="Default" style:data-style-name="N10002">
      <style:text-properties style:font-name="Liberation Sans"/>
    </style:style>
    <style:style style:name="ce28" style:family="table-cell" style:parent-style-name="Default" style:data-style-name="N10001">
      <style:text-properties style:font-name="Liberation Sans"/>
    </style:style>
    <style:style style:name="ce41" style:family="table-cell" style:parent-style-name="Default" style:data-style-name="N10119"/>
    <style:style style:name="ce42" style:family="table-cell" style:parent-style-name="Default" style:data-style-name="N10000">
      <style:table-cell-properties fo:background-color="#729fcf"/>
    </style:style>
    <style:style style:name="ce43" style:family="table-cell" style:parent-style-name="Default" style:data-style-name="N10000">
      <style:table-cell-properties fo:background-color="#729fcf"/>
      <style:text-properties style:font-name="Liberation Sans"/>
    </style:style>
    <style:style style:name="ce44" style:family="table-cell" style:parent-style-name="Default" style:data-style-name="N10000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00">
      <style:table-cell-properties fo:background-color="#2a6099"/>
    </style:style>
    <style:style style:name="ce46" style:family="table-cell" style:parent-style-name="Default" style:data-style-name="N10000">
      <style:table-cell-properties fo:background-color="#2a6099"/>
      <style:text-properties style:font-name="Liberation Sans"/>
    </style:style>
    <style:style style:name="ce47" style:family="table-cell" style:parent-style-name="Default" style:data-style-name="N10000">
      <style:table-cell-properties fo:background-color="#2a6099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02"/>
    <style:style style:name="ce49" style:family="table-cell" style:parent-style-name="Default" style:data-style-name="N10125">
      <style:text-properties style:font-name="Liberation Sans"/>
    </style:style>
    <style:style style:name="ce59" style:family="table-cell" style:parent-style-name="Default" style:data-style-name="N10125"/>
    <style:style style:name="ce6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  <style:paragraph-properties fo:text-align="center"/>
    </style:style>
    <style:style style:name="gr4" style:family="graphic" style:parent-style-name="Note">
      <style:graphic-properties fo:min-height="1.976cm" loext:decorative="false"/>
      <style:paragraph-properties style:writing-mode="lr-tb"/>
    </style:style>
    <style:style style:name="gr5" style:family="graphic" style:parent-style-name="Note">
      <style:graphic-properties fo:min-height="2.371cm" loext:decorative="false"/>
      <style:paragraph-properties style:writing-mode="lr-tb"/>
    </style:style>
    <style:style style:name="gr6" style:family="graphic" style:parent-style-name="Note">
      <style:graphic-properties fo:min-height="2.766cm" loext:decorative="false"/>
      <style:paragraph-properties style:writing-mode="lr-tb"/>
    </style:style>
    <style:style style:name="gr7" style:family="graphic" style:parent-style-name="Note">
      <style:graphic-properties fo:min-height="3.161cm" loext:decorative="false"/>
      <style:paragraph-properties style:writing-mode="lr-tb"/>
    </style:style>
    <style:style style:name="gr8" style:family="graphic" style:parent-style-name="Note">
      <style:graphic-properties fo:min-height="1.59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font-name-asian="Microsoft YaHei" style:font-size-asian="10pt" style:font-name-complex="Arial" style:font-size-complex="10pt"/>
    </style:style>
    <style:style style:name="T2" style:family="text">
      <style:text-properties fo:language="en" fo:country="US"/>
    </style:style>
    <style:style style:name="T3" style:family="text">
      <style:text-properties style:text-position="super 58%"/>
    </style:style>
    <style:style style:name="T4" style:family="text">
      <style:text-properties fo:language="en" fo:country="G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lear&quot;;&quot;Rain&quot;;&quot;Storm&quot;)" table:allow-empty-cell="true" table:display-list="unsorted" table:base-cell-address="Arkusz1.B35">
          <table:error-message table:message-type="stop" table:display="true"/>
        </table:content-validation>
      </table:content-validations>
      <table:table table:name="Arkusz1" table:style-name="ta1">
        <table:shapes>
          <draw:frame draw:z-index="0" draw:name="Obraz 63" draw:style-name="gr1" draw:text-style-name="P1" svg:width="2.28cm" svg:height="0.451cm" svg:x="12.16cm" svg:y="0.633cm">
            <draw:image xlink:href="Pictures/100000010000005300000011606A6C1C.png" xlink:type="simple" xlink:show="embed" xlink:actuate="onLoad" draw:mime-type="image/png">
              <text:p/>
            </draw:image>
          </draw:frame>
          <draw:frame draw:z-index="8" draw:name="Obraz 57" draw:style-name="gr1" draw:text-style-name="P1" svg:width="0.66cm" svg:height="0.422cm" svg:x="11.479cm" svg:y="1.106cm">
            <draw:image xlink:href="Pictures/100000010000001900000010C1D3B478.png" xlink:type="simple" xlink:show="embed" xlink:actuate="onLoad" draw:mime-type="image/png">
              <text:p/>
            </draw:image>
          </draw:frame>
          <draw:frame draw:z-index="9" draw:name="Obraz 64" draw:style-name="gr1" draw:text-style-name="P1" svg:width="0.961cm" svg:height="0.504cm" svg:x="11.202cm" svg:y="1.519cm">
            <draw:image xlink:href="Pictures/100000010000002300000013C77DDD5D.png" xlink:type="simple" xlink:show="embed" xlink:actuate="onLoad" draw:mime-type="image/png">
              <text:p/>
            </draw:image>
          </draw:frame>
          <draw:frame draw:z-index="10" draw:name="Obraz 58" draw:style-name="gr1" draw:text-style-name="P1" svg:width="0.933cm" svg:height="0.371cm" svg:x="11.214cm" svg:y="2.009cm">
            <draw:image xlink:href="Pictures/10000001000000220000000EAB310434.png" xlink:type="simple" xlink:show="embed" xlink:actuate="onLoad" draw:mime-type="image/png">
              <text:p/>
            </draw:image>
          </draw:frame>
          <draw:frame draw:z-index="11" draw:name="Obraz 59" draw:style-name="gr1" draw:text-style-name="P1" svg:width="0.369cm" svg:height="0.369cm" svg:x="11.745cm" svg:y="2.461cm">
            <draw:image xlink:href="Pictures/100000010000000E0000000E4E146B4D.png" xlink:type="simple" xlink:show="embed" xlink:actuate="onLoad" draw:mime-type="image/png">
              <text:p/>
            </draw:image>
          </draw:frame>
          <draw:frame draw:z-index="12" draw:name="Obraz 1" draw:style-name="gr2" draw:text-style-name="P1" svg:width="0.475cm" svg:height="0.475cm" svg:x="3.381cm" svg:y="3.358cm">
            <draw:image xlink:href="Pictures/100000010000001200000012DFD8CF81.png" xlink:type="simple" xlink:show="embed" xlink:actuate="onLoad" draw:mime-type="image/png">
              <text:p/>
            </draw:image>
          </draw:frame>
          <draw:frame draw:z-index="13" draw:name="Obraz 65" draw:style-name="gr1" draw:text-style-name="P1" svg:width="0.475cm" svg:height="0.475cm" svg:x="11.656cm" svg:y="3.358cm">
            <draw:image xlink:href="Pictures/100000010000001200000012DFD8CF81.png" xlink:type="simple" xlink:show="embed" xlink:actuate="onLoad" draw:mime-type="image/png">
              <text:p/>
            </draw:image>
          </draw:frame>
          <draw:frame draw:z-index="14" draw:name="Obraz 61" draw:style-name="gr1" draw:text-style-name="P1" svg:width="0.382cm" svg:height="0.42cm" svg:x="11.743cm" svg:y="2.915cm">
            <draw:image xlink:href="Pictures/1000000100000014000000169FD8A796.png" xlink:type="simple" xlink:show="embed" xlink:actuate="onLoad" draw:mime-type="image/png">
              <text:p/>
            </draw:image>
          </draw:frame>
          <draw:frame draw:z-index="15" draw:name="Obraz 44" draw:style-name="gr1" draw:text-style-name="P1" svg:width="0.961cm" svg:height="0.504cm" svg:x="4.554cm" svg:y="4.244cm">
            <draw:image xlink:href="Pictures/100000010000002300000013C77DDD5D.png" xlink:type="simple" xlink:show="embed" xlink:actuate="onLoad" draw:mime-type="image/png">
              <text:p/>
            </draw:image>
          </draw:frame>
          <draw:frame draw:z-index="16" draw:name="Obraz 60" draw:style-name="gr1" draw:text-style-name="P1" svg:width="0.961cm" svg:height="0.504cm" svg:x="12.882cm" svg:y="4.267cm">
            <draw:image xlink:href="Pictures/100000010000002300000013C77DDD5D.png" xlink:type="simple" xlink:show="embed" xlink:actuate="onLoad" draw:mime-type="image/png">
              <text:p/>
            </draw:image>
          </draw:frame>
          <draw:frame draw:z-index="17" draw:name="Obraz 38" draw:style-name="gr1" draw:text-style-name="P1" svg:width="0.734cm" svg:height="0.489cm" svg:x="3.1cm" svg:y="5.133cm">
            <draw:image xlink:href="Pictures/100000010000001E00000014C99D5F1E.png" xlink:type="simple" xlink:show="embed" xlink:actuate="onLoad" draw:mime-type="image/png">
              <text:p/>
            </draw:image>
          </draw:frame>
          <draw:frame draw:z-index="18" draw:name="Obraz 69" draw:style-name="gr1" draw:text-style-name="P1" svg:width="0.734cm" svg:height="0.489cm" svg:x="11.422cm" svg:y="5.117cm">
            <draw:image xlink:href="Pictures/100000010000001E00000014C99D5F1E.png" xlink:type="simple" xlink:show="embed" xlink:actuate="onLoad" draw:mime-type="image/png">
              <text:p/>
            </draw:image>
          </draw:frame>
          <draw:frame draw:z-index="19" draw:name="Obraz 70" draw:style-name="gr1" draw:text-style-name="P1" svg:width="0.834cm" svg:height="0.331cm" svg:x="33.374cm" svg:y="0.693cm">
            <draw:image xlink:href="Pictures/10000001000000220000000EAB310434.png" xlink:type="simple" xlink:show="embed" xlink:actuate="onLoad" draw:mime-type="image/png">
              <text:p/>
            </draw:image>
          </draw:frame>
          <draw:frame draw:z-index="20" draw:name="Obraz 84" draw:style-name="gr1" draw:text-style-name="P1" svg:width="0.834cm" svg:height="0.331cm" svg:x="33.405cm" svg:y="1.136cm">
            <draw:image xlink:href="Pictures/10000001000000220000000EAB310434.png" xlink:type="simple" xlink:show="embed" xlink:actuate="onLoad" draw:mime-type="image/png">
              <text:p/>
            </draw:image>
          </draw:frame>
          <draw:frame draw:z-index="21" draw:name="Obraz 85" draw:style-name="gr1" draw:text-style-name="P1" svg:width="0.961cm" svg:height="0.504cm" svg:x="33.286cm" svg:y="1.554cm">
            <draw:image xlink:href="Pictures/100000010000002300000013C77DDD5D.png" xlink:type="simple" xlink:show="embed" xlink:actuate="onLoad" draw:mime-type="image/png">
              <text:p/>
            </draw:image>
          </draw:frame>
          <draw:frame draw:z-index="22" draw:name="Obraz 87" draw:style-name="gr1" draw:text-style-name="P1" svg:width="0.712cm" svg:height="0.531cm" svg:x="33.461cm" svg:y="1.037cm">
            <draw:image xlink:href="Pictures/100000010000001A00000014C4FF9780.png" xlink:type="simple" xlink:show="embed" xlink:actuate="onLoad" draw:mime-type="image/png">
              <text:p/>
            </draw:image>
          </draw:frame>
          <draw:frame draw:z-index="23" draw:name="Obraz 83" draw:style-name="gr1" draw:text-style-name="P1" svg:width="0.634cm" svg:height="0.422cm" svg:x="3.198cm" svg:y="5.623cm">
            <draw:image xlink:href="Pictures/10000001000000180000001094DFF98C.png" xlink:type="simple" xlink:show="embed" xlink:actuate="onLoad" draw:mime-type="image/png">
              <text:p/>
            </draw:image>
          </draw:frame>
          <draw:frame draw:z-index="24" draw:name="Obraz 86" draw:style-name="gr1" draw:text-style-name="P1" svg:width="0.634cm" svg:height="0.422cm" svg:x="11.419cm" svg:y="5.623cm">
            <draw:image xlink:href="Pictures/10000001000000180000001094DFF98C.png" xlink:type="simple" xlink:show="embed" xlink:actuate="onLoad" draw:mime-type="image/png">
              <text:p/>
            </draw:image>
          </draw:frame>
          <draw:frame draw:z-index="25" draw:name="Obraz 7" draw:style-name="gr1" draw:text-style-name="P1" svg:width="0.951cm" svg:height="0.422cm" svg:x="2.901cm" svg:y="6.525cm">
            <draw:image xlink:href="Pictures/10000001000000240000001099C924C4.png" xlink:type="simple" xlink:show="embed" xlink:actuate="onLoad" draw:mime-type="image/png">
              <text:p/>
            </draw:image>
          </draw:frame>
          <draw:frame draw:z-index="26" draw:name="Obraz 95" draw:style-name="gr1" draw:text-style-name="P1" svg:width="0.951cm" svg:height="0.422cm" svg:x="11.215cm" svg:y="6.525cm">
            <draw:image xlink:href="Pictures/10000001000000240000001099C924C4.png" xlink:type="simple" xlink:show="embed" xlink:actuate="onLoad" draw:mime-type="image/png">
              <text:p/>
            </draw:image>
          </draw:frame>
          <draw:frame draw:z-index="27" draw:name="Obraz 45" draw:style-name="gr1" draw:text-style-name="P1" svg:width="0.933cm" svg:height="0.371cm" svg:x="4.654cm" svg:y="7.879cm">
            <draw:image xlink:href="Pictures/10000001000000220000000EAB310434.png" xlink:type="simple" xlink:show="embed" xlink:actuate="onLoad" draw:mime-type="image/png">
              <text:p/>
            </draw:image>
          </draw:frame>
          <draw:frame draw:z-index="28" draw:name="Obraz 82" draw:style-name="gr1" draw:text-style-name="P1" svg:width="0.899cm" svg:height="0.369cm" svg:x="12.882cm" svg:y="7.879cm">
            <draw:image xlink:href="Pictures/10000001000000220000000EAB310434.png" xlink:type="simple" xlink:show="embed" xlink:actuate="onLoad" draw:mime-type="image/png">
              <text:p/>
            </draw:image>
          </draw:frame>
          <draw:frame draw:z-index="29" draw:name="Obraz 14" draw:style-name="gr1" draw:text-style-name="P1" svg:width="0.66cm" svg:height="0.422cm" svg:x="3.2cm" svg:y="8.331cm">
            <draw:image xlink:href="Pictures/100000010000001900000010C1D3B478.png" xlink:type="simple" xlink:show="embed" xlink:actuate="onLoad" draw:mime-type="image/png">
              <text:p/>
            </draw:image>
          </draw:frame>
          <draw:frame draw:z-index="30" draw:name="Obraz 73" draw:style-name="gr1" draw:text-style-name="P1" svg:width="0.66cm" svg:height="0.422cm" svg:x="11.479cm" svg:y="8.331cm">
            <draw:image xlink:href="Pictures/100000010000001900000010C1D3B478.png" xlink:type="simple" xlink:show="embed" xlink:actuate="onLoad" draw:mime-type="image/png">
              <text:p/>
            </draw:image>
          </draw:frame>
          <draw:frame draw:z-index="31" draw:name="Obraz 54" draw:style-name="gr1" draw:text-style-name="P1" svg:width="0.951cm" svg:height="0.422cm" svg:x="2.901cm" svg:y="9.234cm">
            <draw:image xlink:href="Pictures/10000001000000240000001099C924C4.png" xlink:type="simple" xlink:show="embed" xlink:actuate="onLoad" draw:mime-type="image/png">
              <text:p/>
            </draw:image>
          </draw:frame>
          <draw:frame draw:z-index="32" draw:name="Obraz 74" draw:style-name="gr1" draw:text-style-name="P1" svg:width="0.951cm" svg:height="0.422cm" svg:x="11.215cm" svg:y="9.234cm">
            <draw:image xlink:href="Pictures/10000001000000240000001099C924C4.png" xlink:type="simple" xlink:show="embed" xlink:actuate="onLoad" draw:mime-type="image/png">
              <text:p/>
            </draw:image>
          </draw:frame>
          <draw:frame draw:z-index="33" draw:name="Obraz 23" draw:style-name="gr1" draw:text-style-name="P1" svg:width="0.66cm" svg:height="0.422cm" svg:x="3.2cm" svg:y="11.04cm">
            <draw:image xlink:href="Pictures/100000010000001900000010C1D3B478.png" xlink:type="simple" xlink:show="embed" xlink:actuate="onLoad" draw:mime-type="image/png">
              <text:p/>
            </draw:image>
          </draw:frame>
          <draw:frame draw:z-index="34" draw:name="Obraz 71" draw:style-name="gr1" draw:text-style-name="P1" svg:width="0.66cm" svg:height="0.422cm" svg:x="11.479cm" svg:y="11.04cm">
            <draw:image xlink:href="Pictures/100000010000001900000010C1D3B478.png" xlink:type="simple" xlink:show="embed" xlink:actuate="onLoad" draw:mime-type="image/png">
              <text:p/>
            </draw:image>
          </draw:frame>
          <draw:frame draw:z-index="35" draw:name="Obraz 4" draw:style-name="gr1" draw:text-style-name="P1" svg:width="0.475cm" svg:height="0.422cm" svg:x="3.3cm" svg:y="11.492cm">
            <draw:image xlink:href="Pictures/100000010000001200000010D21DB74C.png" xlink:type="simple" xlink:show="embed" xlink:actuate="onLoad" draw:mime-type="image/png">
              <text:p/>
            </draw:image>
          </draw:frame>
          <draw:frame draw:z-index="36" draw:name="Obraz 72" draw:style-name="gr1" draw:text-style-name="P1" svg:width="0.475cm" svg:height="0.422cm" svg:x="11.57cm" svg:y="11.492cm">
            <draw:image xlink:href="Pictures/100000010000001200000010D21DB74C.png" xlink:type="simple" xlink:show="embed" xlink:actuate="onLoad" draw:mime-type="image/png">
              <text:p/>
            </draw:image>
          </draw:frame>
          <draw:frame draw:z-index="37" draw:name="Obraz 28" draw:style-name="gr1" draw:text-style-name="P1" svg:width="0.475cm" svg:height="0.422cm" svg:x="3.301cm" svg:y="13.75cm">
            <draw:image xlink:href="Pictures/100000010000001200000010E8F7B126.png" xlink:type="simple" xlink:show="embed" xlink:actuate="onLoad" draw:mime-type="image/png">
              <text:p/>
            </draw:image>
          </draw:frame>
          <draw:frame draw:z-index="38" draw:name="Obraz 75" draw:style-name="gr1" draw:text-style-name="P1" svg:width="0.475cm" svg:height="0.422cm" svg:x="11.656cm" svg:y="13.75cm">
            <draw:image xlink:href="Pictures/100000010000001200000010E8F7B126.png" xlink:type="simple" xlink:show="embed" xlink:actuate="onLoad" draw:mime-type="image/png">
              <text:p/>
            </draw:image>
          </draw:frame>
          <draw:frame draw:z-index="39" draw:name="Obraz 47" draw:style-name="gr1" draw:text-style-name="P1" svg:width="0.475cm" svg:height="0.422cm" svg:x="3.301cm" svg:y="14.201cm">
            <draw:image xlink:href="Pictures/100000010000001200000010E8F7B126.png" xlink:type="simple" xlink:show="embed" xlink:actuate="onLoad" draw:mime-type="image/png">
              <text:p/>
            </draw:image>
          </draw:frame>
          <draw:frame draw:z-index="40" draw:name="Obraz 48" draw:style-name="gr1" draw:text-style-name="P1" svg:width="0.309cm" svg:height="0.269cm" svg:x="3.601cm" svg:y="14.399cm">
            <draw:image xlink:href="Pictures/20000009000009EC000008A43AF4CB4D.svm" xlink:type="simple" xlink:show="embed" xlink:actuate="onLoad" draw:mime-type="image/x-svm">
              <text:p/>
            </draw:image>
            <draw:image xlink:href="Pictures/1000000100000061000000557C9F5670.png" xlink:type="simple" xlink:show="embed" xlink:actuate="onLoad" draw:mime-type="image/png"/>
          </draw:frame>
          <draw:frame draw:z-index="41" draw:name="Obraz 78" draw:style-name="gr1" draw:text-style-name="P1" svg:width="0.309cm" svg:height="0.269cm" svg:x="11.796cm" svg:y="14.399cm">
            <draw:image xlink:href="Pictures/20000009000009EC000008A43AF4CB4D.svm" xlink:type="simple" xlink:show="embed" xlink:actuate="onLoad" draw:mime-type="image/x-svm">
              <text:p/>
            </draw:image>
            <draw:image xlink:href="Pictures/1000000100000061000000557C9F5670.png" xlink:type="simple" xlink:show="embed" xlink:actuate="onLoad" draw:mime-type="image/png"/>
          </draw:frame>
          <draw:frame draw:z-index="42" draw:name="Obraz 79" draw:style-name="gr1" draw:text-style-name="P1" svg:width="0.475cm" svg:height="0.422cm" svg:x="11.671cm" svg:y="14.653cm">
            <draw:image xlink:href="Pictures/100000010000001200000010E8F7B126.png" xlink:type="simple" xlink:show="embed" xlink:actuate="onLoad" draw:mime-type="image/png">
              <text:p/>
            </draw:image>
          </draw:frame>
          <draw:frame draw:z-index="43" draw:name="Obraz 46" draw:style-name="gr1" draw:text-style-name="P1" svg:width="0.475cm" svg:height="0.422cm" svg:x="3.401cm" svg:y="14.653cm">
            <draw:image xlink:href="Pictures/100000010000001200000010E8F7B126.png" xlink:type="simple" xlink:show="embed" xlink:actuate="onLoad" draw:mime-type="image/png">
              <text:p/>
            </draw:image>
          </draw:frame>
          <draw:frame draw:z-index="44" draw:name="Obraz 3" draw:style-name="gr1" draw:text-style-name="P1" svg:width="0.707cm" svg:height="0.471cm" svg:x="3.201cm" svg:y="15.104cm">
            <draw:image xlink:href="Pictures/100000010000001E000000149BEE70FA.png" xlink:type="simple" xlink:show="embed" xlink:actuate="onLoad" draw:mime-type="image/png">
              <text:p/>
            </draw:image>
          </draw:frame>
          <draw:frame draw:z-index="45" draw:name="Obraz 80" draw:style-name="gr1" draw:text-style-name="P1" svg:width="0.707cm" svg:height="0.471cm" svg:x="11.481cm" svg:y="15.104cm">
            <draw:image xlink:href="Pictures/100000010000001E000000149BEE70FA.png" xlink:type="simple" xlink:show="embed" xlink:actuate="onLoad" draw:mime-type="image/png">
              <text:p/>
            </draw:image>
          </draw:frame>
          <draw:frame draw:z-index="46" draw:name="Obraz 35" draw:style-name="gr1" draw:text-style-name="P1" svg:width="0.422cm" svg:height="0.422cm" svg:x="3.4cm" svg:y="15.556cm">
            <draw:image xlink:href="Pictures/100000010000001000000010B1E1AE33.png" xlink:type="simple" xlink:show="embed" xlink:actuate="onLoad" draw:mime-type="image/png">
              <text:p/>
            </draw:image>
          </draw:frame>
          <draw:frame draw:z-index="47" draw:name="Obraz 81" draw:style-name="gr1" draw:text-style-name="P1" svg:width="0.422cm" svg:height="0.422cm" svg:x="11.67cm" svg:y="15.556cm">
            <draw:image xlink:href="Pictures/100000010000001000000010B1E1AE33.png" xlink:type="simple" xlink:show="embed" xlink:actuate="onLoad" draw:mime-type="image/png">
              <text:p/>
            </draw:image>
          </draw:frame>
          <draw:frame draw:z-index="48" draw:name="Obraz 2" draw:style-name="gr1" draw:text-style-name="P1" svg:width="0.911cm" svg:height="0.183cm" draw:transform="skewX (-0.027401669256311) rotate (-0.239982772149221) translate (3.039cm 6.976cm)">
            <draw:image xlink:href="Pictures/1000000100000022000000075CD6957F.png" xlink:type="simple" xlink:show="embed" xlink:actuate="onLoad" draw:mime-type="image/png">
              <text:p/>
            </draw:image>
          </draw:frame>
          <draw:frame draw:z-index="49" draw:name="Obraz 8" draw:style-name="gr1" draw:text-style-name="P1" svg:width="0.421cm" svg:height="0.421cm" svg:x="3.4cm" svg:y="6.971cm">
            <draw:image xlink:href="Pictures/100000010000001000000010B1E1AE33.png" xlink:type="simple" xlink:show="embed" xlink:actuate="onLoad" draw:mime-type="image/png">
              <text:p/>
            </draw:image>
          </draw:frame>
          <draw:frame draw:z-index="50" draw:name="Obraz 66" draw:style-name="gr1" draw:text-style-name="P1" svg:width="0.911cm" svg:height="0.183cm" draw:transform="skewX (-0.027401669256311) rotate (-0.239982772149221) translate (11.262cm 6.981cm)">
            <draw:image xlink:href="Pictures/1000000100000022000000075CD6957F.png" xlink:type="simple" xlink:show="embed" xlink:actuate="onLoad" draw:mime-type="image/png">
              <text:p/>
            </draw:image>
          </draw:frame>
          <draw:frame draw:z-index="51" draw:name="Obraz 67" draw:style-name="gr1" draw:text-style-name="P1" svg:width="0.421cm" svg:height="0.421cm" svg:x="11.623cm" svg:y="6.976cm">
            <draw:image xlink:href="Pictures/100000010000001000000010B1E1AE33.png" xlink:type="simple" xlink:show="embed" xlink:actuate="onLoad" draw:mime-type="image/png">
              <text:p/>
            </draw:image>
          </draw:frame>
          <draw:frame draw:z-index="52" draw:name="Obraz 96" draw:style-name="gr1" draw:text-style-name="P1" svg:width="0.961cm" svg:height="0.504cm" svg:x="33.277cm" svg:y="2.016cm">
            <draw:image xlink:href="Pictures/100000010000002300000013C77DDD5D.png" xlink:type="simple" xlink:show="embed" xlink:actuate="onLoad" draw:mime-type="image/png">
              <text:p/>
            </draw:image>
          </draw:frame>
          <draw:frame draw:z-index="53" draw:name="Obraz 101" draw:style-name="gr1" draw:text-style-name="P1" svg:width="0.712cm" svg:height="0.531cm" svg:x="33.437cm" svg:y="1.942cm">
            <draw:image xlink:href="Pictures/100000010000001A00000014C4FF978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4" table:default-cell-style-name="ce11"/>
        <table:table-column table:style-name="co2" table:default-cell-style-name="ce11"/>
        <table:table-column table:style-name="co6" table:default-cell-style-name="ce11"/>
        <table:table-column table:style-name="co2" table:number-columns-repeated="16374" table:default-cell-style-name="ce11"/>
        <table:table-row table:style-name="ro1">
          <table:table-cell table:style-name="ce1" office:value-type="string" calcext:value-type="string" table:number-columns-spanned="2" table:number-rows-spanned="1">
            <text:p>Your Flee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nemy Flee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Naval Bomber Damage Calculation</text:p>
            <draw:frame table:end-cell-address="Arkusz1.G3" table:end-x="7.746cm" table:end-y="0.04cm" draw:z-index="54" draw:name="Obraz 9" draw:style-name="gr1" draw:text-style-name="P1" svg:width="0.961cm" svg:height="0.504cm" svg:x="6.785cm" svg:y="0.642cm">
              <draw:image xlink:href="Pictures/100000010000002300000013C77DDD5D.png" xlink:type="simple" xlink:show="embed" xlink:actuate="onLoad" draw:mime-type="image/png">
                <text:p/>
              </draw:image>
            </draw:frame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ir Battle</text:p>
          </table:table-cell>
          <table:covered-table-cell/>
          <table:table-cell table:number-columns-repeated="16373"/>
        </table:table-row>
        <table:table-row table:style-name="ro2">
          <table:table-cell table:style-name="ce3" office:value-type="string" calcext:value-type="string" table:number-columns-spanned="2" table:number-rows-spanned="1">
            <text:p><text:span text:style-name="T2">Aircraft</text:span> <text:span text:style-name="T2">Carrier</text:span> s<text:span text:style-name="T2">tats</text:span></text:p>
          </table:table-cell>
          <table:covered-table-cell>
            <draw:frame table:end-cell-address="Arkusz1.C2" table:end-x="0.031cm" table:end-y="0.452cm" draw:z-index="55" draw:name="Obraz 39" draw:style-name="gr2" draw:text-style-name="P1" svg:width="2.28cm" svg:height="0.451cm" svg:x="0.008cm" svg:y="0.001cm">
              <draw:image xlink:href="Pictures/100000010000005300000011606A6C1C.png" xlink:type="simple" xlink:show="embed" xlink:actuate="onLoad" draw:mime-type="image/png">
                <text:p/>
              </draw:image>
            </draw:frame>
          </table:covered-table-cell>
          <table:table-cell/>
          <table:table-cell table:style-name="ce3" office:value-type="string" calcext:value-type="string" table:number-columns-spanned="2" table:number-rows-spanned="1">
            <text:p><text:span text:style-name="T2">Aircraft</text:span> <text:span text:style-name="T2">Carrier</text:span> s<text:span text:style-name="T2">tats</text:span></text:p>
          </table:table-cell>
          <table:covered-table-cell/>
          <table:table-cell/>
          <table:table-cell table:style-name="ce4" office:value-type="string" calcext:value-type="string">
            <text:p>Naval Bombers in the air:</text:p>
          </table:table-cell>
          <table:table-cell table:style-name="ce28" table:formula="of:=FLOOR([.B4]*([.B6]*[.B34]*(1+[.B26])*(1+[.B27])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Friendly fighters in the air:</text:p>
          </table:table-cell>
          <table:table-cell table:style-name="ce28" table:formula="of:=FLOOR([.B5]*(([.B34]+[.B28])*[.B6]*(1+[.B26])*(1+[.B27])))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Anti-air</text:p>
            <draw:frame table:end-cell-address="Arkusz1.A5" table:end-x="3.841cm" table:end-y="0.014cm" draw:z-index="56" draw:name="Obraz 43" draw:style-name="gr2" draw:text-style-name="P1" svg:width="0.961cm" svg:height="0.504cm" svg:x="2.88cm" svg:y="0.413cm">
              <draw:image xlink:href="Pictures/100000010000002300000013C77DDD5D.png" xlink:type="simple" xlink:show="embed" xlink:actuate="onLoad" draw:mime-type="image/png">
                <text:p/>
              </draw:image>
            </draw:frame>
            <draw:frame table:end-cell-address="Arkusz1.A3" table:end-x="3.86cm" table:end-y="0.422cm" draw:z-index="57" draw:name="Obraz 16" draw:style-name="gr1" draw:text-style-name="P1" svg:width="0.66cm" svg:height="0.422cm" svg:x="3.2cm" svg:y="0cm">
              <draw:image xlink:href="Pictures/100000010000001900000010C1D3B478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0" calcext:value-type="float">
            <text:p>0.0</text:p>
          </table:table-cell>
          <table:table-cell/>
          <table:table-cell table:style-name="ce4" office:value-type="string" calcext:value-type="string">
            <text:p>Anti-air</text:p>
          </table:table-cell>
          <table:table-cell table:style-name="ce22" office:value-type="float" office:value="0" calcext:value-type="float">
            <text:p>0.0</text:p>
          </table:table-cell>
          <table:table-cell/>
          <table:table-cell table:style-name="Default" office:value-type="string" calcext:value-type="string">
            <text:p>Planes successfully escorted through CAP:</text:p>
          </table:table-cell>
          <table:table-cell table:style-name="ce41" table:formula="of:=IF(([.H2]-[.K21]-(([.H2]-[.K21])*(1-[.K25])))&gt;0;([.H2]-[.K21]-(([.H2]-[.K21])*(1-[.K25])));0)" office:value-type="float" office:value="0" calcext:value-type="float">
            <text:p>0.0000</text:p>
          </table:table-cell>
          <table:table-cell/>
          <table:table-cell table:style-name="ce34" office:value-type="string" calcext:value-type="string">
            <text:p>Enemy fighters in the air:</text:p>
          </table:table-cell>
          <table:table-cell table:style-name="ce28" table:formula="of:=FLOOR([.E5]*(([.E34]+[.E28])*[.E6]*(1+[.E26])*(1+[.E27])))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<text:span text:style-name="T2">Naval</text:span> <text:span text:style-name="T2">Bombers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Naval</text:span> <text:span text:style-name="T2">Bombers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Preemptive AA strike chance:</text:p>
            <draw:frame table:end-cell-address="Arkusz1.G4" table:end-x="7.658cm" table:end-y="0.438cm" draw:z-index="58" draw:name="Obraz 5" draw:style-name="gr1" draw:text-style-name="P1" svg:width="0.66cm" svg:height="0.422cm" svg:x="6.998cm" svg:y="0.016cm">
              <draw:image xlink:href="Pictures/100000010000001900000010C1D3B478.png" xlink:type="simple" xlink:show="embed" xlink:actuate="onLoad" draw:mime-type="image/png">
                <text:p/>
              </draw:image>
            </draw:frame>
            <draw:frame table:end-cell-address="Arkusz1.G5" table:end-x="7.63cm" table:end-y="0.032cm" draw:z-index="59" draw:name="Obraz 37" draw:style-name="gr1" draw:text-style-name="P1" svg:width="0.303cm" svg:height="0.264cm" svg:x="7.327cm" svg:y="0.219cm">
              <draw:image xlink:href="Pictures/20000009000009EC000008A43AF4CB4D.svm" xlink:type="simple" xlink:show="embed" xlink:actuate="onLoad" draw:mime-type="image/x-svm">
                <text:p/>
              </draw:image>
              <draw:image xlink:href="Pictures/1000000100000061000000557C9F5670.png" xlink:type="simple" xlink:show="embed" xlink:actuate="onLoad" draw:mime-type="image/png"/>
            </draw:frame>
          </table:table-cell>
          <table:table-cell table:style-name="ce29" table:formula="of:=28.35%-(0.1%*[.B15])" office:value-type="percentage" office:value="0.2535" calcext:value-type="percentage">
            <text:p>25.35%</text:p>
          </table:table-cell>
          <table:table-cell/>
          <table:table-cell table:style-name="ce4" office:value-type="string" calcext:value-type="string">
            <text:p>Friendly Bombers in the air:</text:p>
          </table:table-cell>
          <table:table-cell table:style-name="ce28" table:formula="of:=FLOOR([.B4]*([.B6]*[.B34]*(1+[.B26])*(1+[.B27]))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Fighters</text:p>
            <draw:frame table:end-cell-address="Arkusz1.A5" table:end-x="3.833cm" table:end-y="0.371cm" draw:z-index="60" draw:name="Obraz 42" draw:style-name="gr1" draw:text-style-name="P1" svg:width="0.933cm" svg:height="0.371cm" svg:x="2.9cm" svg:y="0cm">
              <draw:image xlink:href="Pictures/10000001000000220000000EAB310434.png" xlink:type="simple" xlink:show="embed" xlink:actuate="onLoad" draw:mime-type="image/png">
                <text:p/>
              </draw:image>
            </draw:frame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Fighters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<text:span text:style-name="T2">Shooted</text:span> planes (if hit):</text:p>
            <draw:frame table:end-cell-address="Arkusz1.G5" table:end-x="7.661cm" table:end-y="0.421cm" draw:z-index="61" draw:name="Obraz 36" draw:style-name="gr1" draw:text-style-name="P1" svg:width="0.66cm" svg:height="0.422cm" svg:x="7.001cm" svg:y="-0.001cm">
              <draw:image xlink:href="Pictures/100000010000001900000010C1D3B478.png" xlink:type="simple" xlink:show="embed" xlink:actuate="onLoad" draw:mime-type="image/png">
                <text:p/>
              </draw:image>
            </draw:frame>
          </table:table-cell>
          <table:table-cell table:style-name="ce30" table:formula="of:=1%*[.E3]*[.H2]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Enemy Bombers in the air:</text:p>
          </table:table-cell>
          <table:table-cell table:style-name="ce28" table:formula="of:=FLOOR([.E4]*([.E6]*[.E34]*(1+[.E26])*(1+[.E27]))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Organization</text:p>
            <draw:frame table:end-cell-address="Arkusz1.A6" table:end-x="3.852cm" table:end-y="0.452cm" draw:z-index="62" draw:name="Obraz 40" draw:style-name="gr1" draw:text-style-name="P1" svg:width="0.452cm" svg:height="0.452cm" svg:x="3.4cm" svg:y="0cm">
              <draw:image xlink:href="Pictures/100000010000000E0000000E4E146B4D.png" xlink:type="simple" xlink:show="embed" xlink:actuate="onLoad" draw:mime-type="image/png">
                <text:p/>
              </draw:image>
            </draw:frame>
          </table:table-cell>
          <table:table-cell table:style-name="ce23" office:value-type="percentage" office:value="1" calcext:value-type="percentage">
            <text:p>100.0%</text:p>
          </table:table-cell>
          <table:table-cell/>
          <table:table-cell table:style-name="ce4" office:value-type="string" calcext:value-type="string">
            <text:p>Organization</text:p>
          </table:table-cell>
          <table:table-cell table:style-name="ce23" office:value-type="percentage" office:value="1" calcext:value-type="percentage">
            <text:p>100.0%</text:p>
          </table:table-cell>
          <table:table-cell/>
          <table:table-cell office:value-type="string" calcext:value-type="string">
            <text:p><text:span text:style-name="T2">Mean</text:span> planes left after AA fire:</text:p>
            <draw:frame table:end-cell-address="Arkusz1.G8" table:end-x="7.724cm" table:end-y="0.008cm" draw:z-index="63" draw:name="Obraz 49" draw:style-name="gr1" draw:text-style-name="P1" svg:width="0.734cm" svg:height="0.489cm" svg:x="6.99cm" svg:y="0.422cm">
              <draw:image xlink:href="Pictures/100000010000001E00000014C99D5F1E.png" xlink:type="simple" xlink:show="embed" xlink:actuate="onLoad" draw:mime-type="image/png">
                <text:p/>
              </draw:image>
            </draw:frame>
            <draw:frame table:end-cell-address="Arkusz1.G6" table:end-x="7.63cm" table:end-y="0.377cm" draw:z-index="64" draw:name="Obraz 10" draw:style-name="gr1" draw:text-style-name="P1" svg:width="0.526cm" svg:height="0.377cm" svg:x="7.104cm" svg:y="0cm">
              <draw:image xlink:href="Pictures/20000009000009EC000007251C43EC56.svm" xlink:type="simple" xlink:show="embed" xlink:actuate="onLoad" draw:mime-type="image/x-svm">
                <text:p/>
              </draw:image>
              <draw:image xlink:href="Pictures/10000001000000610000004684E6C66E.png" xlink:type="simple" xlink:show="embed" xlink:actuate="onLoad" draw:mime-type="image/png"/>
            </draw:frame>
          </table:table-cell>
          <table:table-cell table:style-name="ce30" table:formula="of:=[.H3]-([.H5]*[.H4])" office:value-type="float" office:value="0" calcext:value-type="float">
            <text:p>0.00</text:p>
          </table:table-cell>
          <table:table-cell/>
          <table:table-cell table:style-name="ce42" office:value-type="string" calcext:value-type="string">
            <text:p>Fighters focused on bombers:</text:p>
          </table:table-cell>
          <table:table-cell table:style-name="ce34" table:formula="of:=IF([.K4]&lt;1;0;([.K4]/([.K2]+[.K4]))*[.K3]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HP</text:p>
            <draw:frame draw:z-index="65" draw:name="Obraz 18" draw:style-name="gr1" draw:text-style-name="P1" svg:width="0.41cm" svg:height="0.453cm" svg:x="3.4cm" svg:y="0cm">
              <draw:image xlink:href="Pictures/1000000100000014000000169FD8A796.png" xlink:type="simple" xlink:show="embed" xlink:actuate="onLoad" draw:mime-type="image/png">
                <text:p/>
              </draw:image>
            </draw:frame>
          </table:table-cell>
          <table:table-cell office:value-type="float" office:value="220.1" calcext:value-type="float">
            <text:p>220.1</text:p>
          </table:table-cell>
          <table:table-cell/>
          <table:table-cell office:value-type="string" calcext:value-type="string">
            <text:p>HP</text:p>
          </table:table-cell>
          <table:table-cell office:value-type="float" office:value="220.1" calcext:value-type="float">
            <text:p>220.1</text:p>
          </table:table-cell>
          <table:table-cell/>
          <table:table-cell office:value-type="string" calcext:value-type="string">
            <text:p>Chance to score a hit on a ship:</text:p>
            <draw:frame table:end-cell-address="Arkusz1.G8" table:end-x="7.589cm" table:end-y="0.017cm" draw:z-index="66" draw:name="Obraz 50" draw:style-name="gr1" draw:text-style-name="P1" svg:width="0.255cm" svg:height="0.269cm" svg:x="7.334cm" svg:y="0.2cm">
              <draw:image xlink:href="Pictures/20000009000009EC000008A43AF4CB4D.svm" xlink:type="simple" xlink:show="embed" xlink:actuate="onLoad" draw:mime-type="image/x-svm">
                <text:p/>
              </draw:image>
              <draw:image xlink:href="Pictures/1000000100000061000000557C9F5670.png" xlink:type="simple" xlink:show="embed" xlink:actuate="onLoad" draw:mime-type="image/png"/>
            </draw:frame>
          </table:table-cell>
          <table:table-cell table:style-name="ce29" table:formula="of:=IF(([.B12]/10*31%)&gt;1;1;[.B12]/10*31%)" office:value-type="percentage" office:value="0.341" calcext:value-type="percentage">
            <text:p>34.10%</text:p>
          </table:table-cell>
          <table:table-cell/>
          <table:table-cell table:style-name="ce43" office:value-type="string" calcext:value-type="string">
            <text:p>Base fighter damage:</text:p>
          </table:table-cell>
          <table:table-cell table:formula="of:=[.K6]*[.E19]*0.2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Reliability</text:p>
          </table:table-cell>
          <table:table-cell table:style-name="ce23" office:value-type="percentage" office:value="0.56" calcext:value-type="percentage">
            <text:p>56.0%</text:p>
          </table:table-cell>
          <table:table-cell/>
          <table:table-cell table:style-name="ce4" office:value-type="string" calcext:value-type="string">
            <text:p>Reliability</text:p>
          </table:table-cell>
          <table:table-cell table:style-name="ce23" office:value-type="percentage" office:value="0.56" calcext:value-type="percentage">
            <text:p>56.0%</text:p>
          </table:table-cell>
          <table:table-cell/>
          <table:table-cell table:style-name="ce4" office:value-type="string" calcext:value-type="string">
            <text:p>Mean amount of planes that scored a hit:</text:p>
            <draw:frame table:end-cell-address="Arkusz1.G8" table:end-x="7.636cm" table:end-y="0.413cm" draw:z-index="67" draw:name="Obraz 11" draw:style-name="gr1" draw:text-style-name="P1" svg:width="0.526cm" svg:height="0.378cm" svg:x="7.11cm" svg:y="0.035cm">
              <draw:image xlink:href="Pictures/20000009000009EC000007251C43EC56.svm" xlink:type="simple" xlink:show="embed" xlink:actuate="onLoad" draw:mime-type="image/x-svm">
                <text:p/>
              </draw:image>
              <draw:image xlink:href="Pictures/10000001000000610000004684E6C66E.png" xlink:type="simple" xlink:show="embed" xlink:actuate="onLoad" draw:mime-type="image/png"/>
            </draw:frame>
          </table:table-cell>
          <table:table-cell table:style-name="ce30" table:formula="of:=[.H6]*[.H7]" office:value-type="float" office:value="0" calcext:value-type="float">
            <text:p>0.00</text:p>
          </table:table-cell>
          <table:table-cell/>
          <table:table-cell table:style-name="ce44" office:value-type="string" calcext:value-type="string">
            <text:p>Agility mitigation:</text:p>
          </table:table-cell>
          <table:table-cell table:formula="of:=ROUND([.K7]*0.3*IF([.B15]&gt;[.E21];IF((([.B15]/[.E21])-1)&gt;3.5;3.5;(([.B15]/[.E21])-1));0))" office:value-type="float" office:value="0" calcext:value-type="float">
            <office:annotation draw:style-name="gr4" svg:width="2.899cm" svg:height="2.176cm" svg:x="37.121cm" svg:y="1.864cm" draw:caption-point-x="-0.61cm" draw:caption-point-y="1.51cm">
              <dc:creator>Nieznany autor</dc:creator>
              <dc:date>2024-12-05T00:00:00</dc:date>
              <text:p>Change in defines:</text:p>
              <text:p>0,3 instead of 0,45</text:p>
              <text:p>3,5 instead of 4</text:p>
            </office:annotation>
            <text:p>0</text:p>
          </table:table-cell>
          <table:table-cell table:number-columns-repeated="1637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Chance of hitting critically:</text:p>
            <draw:frame table:end-cell-address="Arkusz1.G10" table:end-x="7.636cm" table:end-y="0.054cm" draw:z-index="68" draw:name="Obraz 15" draw:style-name="gr1" draw:text-style-name="P1" svg:width="0.309cm" svg:height="0.269cm" svg:x="7.327cm" svg:y="0.237cm">
              <draw:image xlink:href="Pictures/20000009000009EC000008A43AF4CB4D.svm" xlink:type="simple" xlink:show="embed" xlink:actuate="onLoad" draw:mime-type="image/x-svm">
                <text:p/>
              </draw:image>
              <draw:image xlink:href="Pictures/1000000100000061000000557C9F5670.png" xlink:type="simple" xlink:show="embed" xlink:actuate="onLoad" draw:mime-type="image/png"/>
            </draw:frame>
            <draw:frame table:end-cell-address="Arkusz1.G9" table:end-x="7.593cm" table:end-y="0.422cm" draw:z-index="69" draw:name="Obraz 19" draw:style-name="gr1" draw:text-style-name="P1" svg:width="0.475cm" svg:height="0.422cm" svg:x="7.118cm" svg:y="0cm">
              <draw:image xlink:href="Pictures/100000010000001200000010E8F7B126.png" xlink:type="simple" xlink:show="embed" xlink:actuate="onLoad" draw:mime-type="image/png">
                <text:p/>
              </draw:image>
            </draw:frame>
          </table:table-cell>
          <table:table-cell table:style-name="ce29" table:formula="of:=(0.2/[.E8])*(1+[.B31])*(1+[.E32])" office:value-type="percentage" office:value="0.357142857142857" calcext:value-type="percentage">
            <text:p>35.71%</text:p>
          </table:table-cell>
          <table:table-cell/>
          <table:table-cell table:style-name="ce43" office:value-type="string" calcext:value-type="string">
            <text:p>Bonus from relative speed:</text:p>
          </table:table-cell>
          <table:table-cell table:formula="of:=ROUND([.K7]*0.5*IF([.E22]&gt;[.B13];IF((([.E22]/[.B13])-1)&gt;2.75;2.75;(([.E22]/[.B13])-1));0))" office:value-type="float" office:value="0" calcext:value-type="float">
            <office:annotation draw:style-name="gr5" svg:width="2.899cm" svg:height="2.571cm" svg:x="37.121cm" svg:y="2.315cm" draw:caption-point-x="-0.61cm" draw:caption-point-y="1.51cm">
              <dc:creator>Nieznany autor</dc:creator>
              <dc:date>2024-12-05T00:00:00</dc:date>
              <text:p>Change in defines:</text:p>
              <text:p>0,5 instead of 0,65</text:p>
              <text:p>2,75 instead of 3,5</text:p>
            </office:annotation>
            <text:p>0</text:p>
          </table:table-cell>
          <table:table-cell table:number-columns-repeated="16373"/>
        </table:table-row>
        <table:table-row table:style-name="ro2">
          <table:table-cell table:style-name="ce15" office:value-type="string" calcext:value-type="string" table:number-columns-spanned="2" table:number-rows-spanned="1">
            <text:p>Naval Bomber stats</text:p>
          </table:table-cell>
          <table:covered-table-cell/>
          <table:table-cell/>
          <table:table-cell table:style-name="ce15" office:value-type="string" calcext:value-type="string" table:number-columns-spanned="2" table:number-rows-spanned="1">
            <text:p>Naval Bomber stats</text:p>
          </table:table-cell>
          <table:covered-table-cell table:style-name="ce26"/>
          <table:table-cell/>
          <table:table-cell office:value-type="string" calcext:value-type="string">
            <text:p><text:span text:style-name="T2">Chance of scoring</text:span> hit on <text:span text:style-name="T2">critical</text:span> part:</text:p>
            <draw:frame table:end-cell-address="Arkusz1.G10" table:end-x="7.591cm" table:end-y="0.421cm" draw:z-index="70" draw:name="Obraz 20" draw:style-name="gr1" draw:text-style-name="P1" svg:width="0.475cm" svg:height="0.421cm" svg:x="7.116cm" svg:y="0cm">
              <draw:image xlink:href="Pictures/100000010000001200000010E8F7B126.png" xlink:type="simple" xlink:show="embed" xlink:actuate="onLoad" draw:mime-type="image/png">
                <text:p/>
              </draw:image>
            </draw:frame>
            <draw:frame table:end-cell-address="Arkusz1.G11" table:end-x="7.636cm" table:end-y="0.018cm" draw:z-index="71" draw:name="Obraz 26" draw:style-name="gr1" draw:text-style-name="P1" svg:width="0.309cm" svg:height="0.269cm" svg:x="7.327cm" svg:y="0.2cm">
              <draw:image xlink:href="Pictures/20000009000009EC000008A43AF4CB4D.svm" xlink:type="simple" xlink:show="embed" xlink:actuate="onLoad" draw:mime-type="image/x-svm">
                <text:p/>
              </draw:image>
              <draw:image xlink:href="Pictures/1000000100000061000000557C9F5670.png" xlink:type="simple" xlink:show="embed" xlink:actuate="onLoad" draw:mime-type="image/png"/>
            </draw:frame>
          </table:table-cell>
          <table:table-cell table:style-name="ce29" table:formula="of:=(0.1/[.E8])*[.H9]" office:value-type="percentage" office:value="0.0637755102040816" calcext:value-type="percentage">
            <text:p>6.38%</text:p>
          </table:table-cell>
          <table:table-cell/>
          <table:table-cell table:style-name="ce43" office:value-type="string" calcext:value-type="string">
            <text:p>Bonus from absolute speed:</text:p>
          </table:table-cell>
          <table:table-cell table:formula="of:=ROUND([.K7]*0.025*IF([.E22]&gt;[.B13];IF((([.E22]/100)-1)&gt;12;12;(([.E22]/100)-1));0))" office:value-type="float" office:value="0" calcext:value-type="float">
            <office:annotation draw:style-name="gr6" svg:width="2.899cm" svg:height="2.966cm" svg:x="37.121cm" svg:y="2.767cm" draw:caption-point-x="-0.61cm" draw:caption-point-y="1.51cm">
              <dc:creator>Nieznany autor</dc:creator>
              <dc:date>2024-12-05T00:00:00</dc:date>
              <text:p>Change in defines: 1200 instead of 800, making:</text:p>
              <text:p>1200/100=12 instead of 800/100=8</text:p>
            </office:annotation>
            <text:p>0</text:p>
          </table:table-cell>
          <table:table-cell table:number-columns-repeated="16373"/>
        </table:table-row>
        <table:table-row table:style-name="ro2">
          <table:table-cell table:style-name="Default" office:value-type="string" calcext:value-type="string">
            <text:p>Air Attack</text:p>
            <draw:frame draw:z-index="72" draw:name="Obraz 92" draw:style-name="gr1" draw:text-style-name="P1" svg:width="0.66cm" svg:height="0.422cm" svg:x="3.2cm" svg:y="-0.002cm">
              <draw:image xlink:href="Pictures/100000010000001900000010C1D3B478.png" xlink:type="simple" xlink:show="embed" xlink:actuate="onLoad" draw:mime-type="image/png">
                <text:p/>
              </draw:image>
            </draw:frame>
          </table:table-cell>
          <table:table-cell table:style-name="ce18" office:value-type="float" office:value="4.5" calcext:value-type="float">
            <text:p>4.5</text:p>
          </table:table-cell>
          <table:table-cell table:style-name="ce34"/>
          <table:table-cell table:style-name="ce34" office:value-type="string" calcext:value-type="string">
            <text:p>Air Attack</text:p>
            <draw:frame draw:z-index="73" draw:name="Obraz 93" draw:style-name="gr1" draw:text-style-name="P1" svg:width="0.66cm" svg:height="0.422cm" svg:x="2.997cm" svg:y="-0.002cm">
              <draw:image xlink:href="Pictures/100000010000001900000010C1D3B478.png" xlink:type="simple" xlink:show="embed" xlink:actuate="onLoad" draw:mime-type="image/png">
                <text:p/>
              </draw:image>
            </draw:frame>
          </table:table-cell>
          <table:table-cell table:style-name="ce18" office:value-type="float" office:value="4.5" calcext:value-type="float">
            <text:p>4.5</text:p>
          </table:table-cell>
          <table:table-cell/>
          <table:table-cell office:value-type="string" calcext:value-type="string">
            <text:p>Chance of scoring regular critical hit:</text:p>
            <draw:frame table:end-cell-address="Arkusz1.G11" table:end-x="7.591cm" table:end-y="0.422cm" draw:z-index="74" draw:name="Obraz 21" draw:style-name="gr1" draw:text-style-name="P1" svg:width="0.475cm" svg:height="0.422cm" svg:x="7.116cm" svg:y="0cm">
              <draw:image xlink:href="Pictures/100000010000001200000010E8F7B126.png" xlink:type="simple" xlink:show="embed" xlink:actuate="onLoad" draw:mime-type="image/png">
                <text:p/>
              </draw:image>
            </draw:frame>
            <draw:frame table:end-cell-address="Arkusz1.G12" table:end-x="7.636cm" table:end-y="0.017cm" draw:z-index="75" draw:name="Obraz 27" draw:style-name="gr1" draw:text-style-name="P1" svg:width="0.309cm" svg:height="0.27cm" svg:x="7.327cm" svg:y="0.199cm">
              <draw:image xlink:href="Pictures/20000009000009EC000008A43AF4CB4D.svm" xlink:type="simple" xlink:show="embed" xlink:actuate="onLoad" draw:mime-type="image/x-svm">
                <text:p/>
              </draw:image>
              <draw:image xlink:href="Pictures/1000000100000061000000557C9F5670.png" xlink:type="simple" xlink:show="embed" xlink:actuate="onLoad" draw:mime-type="image/png"/>
            </draw:frame>
          </table:table-cell>
          <table:table-cell table:style-name="ce29" table:formula="of:=[.H9]-[.H10]" office:value-type="percentage" office:value="0.293367346938776" calcext:value-type="percentage">
            <text:p>29.34%</text:p>
          </table:table-cell>
          <table:table-cell/>
          <table:table-cell table:style-name="ce45" office:value-type="string" calcext:value-type="string">
            <text:p>Bombers focused on bombers:</text:p>
          </table:table-cell>
          <table:table-cell table:style-name="ce34" table:formula="of:=IF([.K4]&lt;1;0;([.K4]/([.K2]+[.K4]))*[.K5]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Naval Targeting</text:p>
          </table:table-cell>
          <table:table-cell table:style-name="ce22" office:value-type="float" office:value="11" calcext:value-type="float">
            <text:p>11.0</text:p>
          </table:table-cell>
          <table:table-cell table:style-name="Default"/>
          <table:table-cell office:value-type="string" calcext:value-type="string">
            <text:p>Naval Targeting</text:p>
          </table:table-cell>
          <table:table-cell table:style-name="ce22" office:value-type="float" office:value="11" calcext:value-type="float">
            <text:p>11.0</text:p>
          </table:table-cell>
          <table:table-cell/>
          <table:table-cell office:value-type="string" calcext:value-type="string">
            <text:p>Mean regular critical hits:</text:p>
            <draw:frame table:end-cell-address="Arkusz1.G12" table:end-x="7.591cm" table:end-y="0.422cm" draw:z-index="76" draw:name="Obraz 22" draw:style-name="gr1" draw:text-style-name="P1" svg:width="0.475cm" svg:height="0.422cm" svg:x="7.116cm" svg:y="0cm">
              <draw:image xlink:href="Pictures/100000010000001200000010E8F7B126.png" xlink:type="simple" xlink:show="embed" xlink:actuate="onLoad" draw:mime-type="image/png">
                <text:p/>
              </draw:image>
            </draw:frame>
          </table:table-cell>
          <table:table-cell table:style-name="ce30" table:formula="of:=[.H8]*[.H11]" office:value-type="float" office:value="0" calcext:value-type="float">
            <text:p>0.00</text:p>
          </table:table-cell>
          <table:table-cell/>
          <table:table-cell table:style-name="ce46" office:value-type="string" calcext:value-type="string">
            <text:p>Base bomber air damage:</text:p>
          </table:table-cell>
          <table:table-cell table:formula="of:=[.K11]*[.E11]*0.2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peed</text:p>
          </table:table-cell>
          <table:table-cell office:value-type="float" office:value="230" calcext:value-type="float">
            <text:p>230</text:p>
          </table:table-cell>
          <table:table-cell table:style-name="Default"/>
          <table:table-cell office:value-type="string" calcext:value-type="string">
            <text:p>Speed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Mean regular hits:</text:p>
            <draw:frame table:end-cell-address="Arkusz1.G13" table:end-x="7.538cm" table:end-y="0.421cm" draw:z-index="77" draw:name="Obraz 41" draw:style-name="gr1" draw:text-style-name="P1" svg:width="0.422cm" svg:height="0.421cm" svg:x="7.116cm" svg:y="0cm">
              <draw:image xlink:href="Pictures/100000010000001000000010B1E1AE33.png" xlink:type="simple" xlink:show="embed" xlink:actuate="onLoad" draw:mime-type="image/png">
                <text:p/>
              </draw:image>
            </draw:frame>
          </table:table-cell>
          <table:table-cell table:style-name="ce30" table:formula="of:=[.H8]-[.H12]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Agility mitigation:</text:p>
          </table:table-cell>
          <table:table-cell table:formula="of:=ROUND([.K12]*0.3*IF([.B15]&gt;[.E15];IF((([.B15]/[.E15])-1)&gt;3.5;3.5;(([.B15]/[.E15])-1));0))" office:value-type="float" office:value="0" calcext:value-type="float">
            <office:annotation draw:style-name="gr4" svg:width="2.899cm" svg:height="2.176cm" svg:x="37.121cm" svg:y="4.122cm" draw:caption-point-x="-0.61cm" draw:caption-point-y="1.51cm">
              <dc:creator>Nieznany autor</dc:creator>
              <dc:date>2024-12-05T00:00:00</dc:date>
              <text:p>Change in defines:</text:p>
              <text:p>0,3 instead of 0,45</text:p>
              <text:p>3,5 instead of 4</text:p>
            </office:annotation>
            <text:p>0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ir Defence</text:p>
            <draw:frame draw:z-index="78" draw:name="Obraz 94" draw:style-name="gr1" draw:text-style-name="P1" svg:width="0.951cm" svg:height="0.422cm" svg:x="3cm" svg:y="0cm">
              <draw:image xlink:href="Pictures/10000001000000240000001055CD21DF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10" calcext:value-type="float">
            <text:p>10.0</text:p>
          </table:table-cell>
          <table:table-cell table:style-name="Default"/>
          <table:table-cell office:value-type="string" calcext:value-type="string">
            <text:p>Air Defence</text:p>
            <draw:frame draw:z-index="79" draw:name="Obraz 97" draw:style-name="gr1" draw:text-style-name="P1" svg:width="0.951cm" svg:height="0.422cm" svg:x="2.798cm" svg:y="-0.002cm">
              <draw:image xlink:href="Pictures/10000001000000240000001055CD21DF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10" calcext:value-type="float">
            <text:p>10.0</text:p>
          </table:table-cell>
          <table:table-cell/>
          <table:table-cell office:value-type="string" calcext:value-type="string">
            <text:p>Regular critical hit damage multiplier:</text:p>
            <draw:frame table:end-cell-address="Arkusz1.G14" table:end-x="7.591cm" table:end-y="0.422cm" draw:z-index="80" draw:name="Obraz 24" draw:style-name="gr1" draw:text-style-name="P1" svg:width="0.475cm" svg:height="0.422cm" svg:x="7.116cm" svg:y="0cm">
              <draw:image xlink:href="Pictures/100000010000001200000010E8F7B126.png" xlink:type="simple" xlink:show="embed" xlink:actuate="onLoad" draw:mime-type="image/png">
                <text:p/>
              </draw:image>
            </draw:frame>
          </table:table-cell>
          <table:table-cell table:style-name="ce30" table:formula="of:=((1-[.E8])*3+1)" office:value-type="float" office:value="2.32" calcext:value-type="float">
            <text:p>2.32</text:p>
          </table:table-cell>
          <table:table-cell/>
          <table:table-cell table:style-name="ce46" office:value-type="string" calcext:value-type="string">
            <text:p>Bonus from relative speed:</text:p>
          </table:table-cell>
          <table:table-cell table:formula="of:=ROUND([.K13]*0.5*IF([.E13]&gt;[.B13];IF((([.E13]/[.B13])-1)&gt;2.75;2.75;(([.E13]/[.B13])-1));0))" office:value-type="float" office:value="0" calcext:value-type="float">
            <office:annotation draw:style-name="gr5" svg:width="2.899cm" svg:height="2.571cm" svg:x="37.121cm" svg:y="4.573cm" draw:caption-point-x="-0.61cm" draw:caption-point-y="1.51cm">
              <dc:creator>Nieznany autor</dc:creator>
              <dc:date>2024-12-05T00:00:00</dc:date>
              <text:p>Change in defines:</text:p>
              <text:p>0,5 instead of 0,65</text:p>
              <text:p>2,75 instead of 3,5</text:p>
            </office:annotation>
            <text:p>0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gility</text:p>
          </table:table-cell>
          <table:table-cell table:style-name="ce22" office:value-type="float" office:value="30" calcext:value-type="float">
            <text:p>30.0</text:p>
          </table:table-cell>
          <table:table-cell/>
          <table:table-cell office:value-type="string" calcext:value-type="string">
            <text:p>Agility</text:p>
          </table:table-cell>
          <table:table-cell table:style-name="ce22" office:value-type="float" office:value="30" calcext:value-type="float">
            <text:p>30.0</text:p>
          </table:table-cell>
          <table:table-cell/>
          <table:table-cell office:value-type="string" calcext:value-type="string">
            <text:p>AA damage reduction:</text:p>
            <draw:frame table:end-cell-address="Arkusz1.G16" table:end-x="7.629cm" table:end-y="0.049cm" draw:z-index="81" draw:name="Obraz 25" draw:style-name="gr1" draw:text-style-name="P1" svg:width="0.302cm" svg:height="0.302cm" svg:x="7.327cm" svg:y="0.198cm">
              <draw:image xlink:href="Pictures/100000010000001000000010958C2BE0.png" xlink:type="simple" xlink:show="embed" xlink:actuate="onLoad" draw:mime-type="image/png">
                <text:p/>
              </draw:image>
            </draw:frame>
            <draw:frame table:end-cell-address="Arkusz1.G15" table:end-x="7.665cm" table:end-y="0.421cm" draw:z-index="82" draw:name="Obraz 12" draw:style-name="gr1" draw:text-style-name="P1" svg:width="0.66cm" svg:height="0.421cm" svg:x="7.005cm" svg:y="0cm">
              <draw:image xlink:href="Pictures/100000010000001900000010C1D3B478.png" xlink:type="simple" xlink:show="embed" xlink:actuate="onLoad" draw:mime-type="image/png">
                <text:p/>
              </draw:image>
            </draw:frame>
          </table:table-cell>
          <table:table-cell table:style-name="ce23" table:formula="of:=IF(((([.E3]+[.E25])^0.2)*0.25)&gt;0.75;0.75;(([.E3]+[.E25])^0.2)*0.25)" office:value-type="percentage" office:value="0" calcext:value-type="percentage">
            <office:annotation draw:style-name="gr7" svg:width="2.899cm" svg:height="3.361cm" svg:x="27.231cm" svg:y="5.025cm" draw:caption-point-x="-0.61cm" draw:caption-point-y="1.51cm">
              <dc:creator>Nieznany autor</dc:creator>
              <dc:date>2024-12-05T00:00:00</dc:date>
              <text:p>It depends on AA of ship &amp; 20% of all fleet AA</text:p>
              <text:p><text:span text:style-name="T1">It cannot exceed 75% reduction (c</text:span>ap changed in defines from 50% to 75%)</text:p>
            </office:annotation>
            <text:p>0.0%</text:p>
          </table:table-cell>
          <table:table-cell/>
          <table:table-cell table:style-name="ce46" office:value-type="string" calcext:value-type="string">
            <text:p>Bonus from absolute speed:</text:p>
          </table:table-cell>
          <table:table-cell table:formula="of:=ROUND([.K14]*0.025*IF([.B13]&gt;[.E13];IF((([.B13]/100)-1)&gt;12;12;(([.B13]/100)-1));0))" office:value-type="float" office:value="0" calcext:value-type="float">
            <office:annotation draw:style-name="gr6" svg:width="2.899cm" svg:height="2.966cm" svg:x="37.121cm" svg:y="5.025cm" draw:caption-point-x="-0.61cm" draw:caption-point-y="1.51cm">
              <dc:creator>Nieznany autor</dc:creator>
              <dc:date>2024-12-05T00:00:00</dc:date>
              <text:p>Change in defines: 1200 instead of 800, making:</text:p>
              <text:p>1200/100=12 instead of 800/100=8</text:p>
            </office:annotation>
            <text:p>0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Naval Attack</text:p>
          </table:table-cell>
          <table:table-cell table:style-name="ce22" office:value-type="float" office:value="8" calcext:value-type="float">
            <text:p>8.0</text:p>
          </table:table-cell>
          <table:table-cell/>
          <table:table-cell office:value-type="string" calcext:value-type="string">
            <text:p>Naval Attack</text:p>
          </table:table-cell>
          <table:table-cell table:style-name="ce22" office:value-type="float" office:value="8" calcext:value-type="float">
            <text:p>8.0</text:p>
          </table:table-cell>
          <table:table-cell/>
          <table:table-cell office:value-type="string" calcext:value-type="string">
            <text:p>Damage dealt by single plane hit:</text:p>
            <draw:frame table:end-cell-address="Arkusz1.G16" table:end-x="7.536cm" table:end-y="0.378cm" draw:z-index="83" draw:name="Obraz 33" draw:style-name="gr1" draw:text-style-name="P1" svg:width="0.526cm" svg:height="0.378cm" svg:x="7.01cm" svg:y="0cm">
              <draw:image xlink:href="Pictures/20000009000009EC000007251C43EC56.svm" xlink:type="simple" xlink:show="embed" xlink:actuate="onLoad" draw:mime-type="image/x-svm">
                <text:p/>
              </draw:image>
              <draw:image xlink:href="Pictures/10000001000000610000004684E6C66E.png" xlink:type="simple" xlink:show="embed" xlink:actuate="onLoad" draw:mime-type="image/png"/>
            </draw:frame>
            <draw:frame table:end-cell-address="Arkusz1.G16" table:end-x="7.617cm" table:end-y="0.42cm" draw:z-index="84" draw:name="Obraz 13" draw:style-name="gr1" draw:text-style-name="P1" svg:width="0.29cm" svg:height="0.29cm" svg:x="7.327cm" svg:y="0.13cm">
              <draw:image xlink:href="Pictures/100000010000001000000010B1E1AE33.png" xlink:type="simple" xlink:show="embed" xlink:actuate="onLoad" draw:mime-type="image/png">
                <text:p/>
              </draw:image>
            </draw:frame>
          </table:table-cell>
          <table:table-cell table:style-name="ce30" table:formula="of:=[.B16]*(1-[.H15])*(1+[.B35])*75%" office:value-type="float" office:value="6" calcext:value-type="float">
            <text:p>6.00</text:p>
          </table:table-cell>
          <table:table-cell/>
          <table:table-cell office:value-type="string" calcext:value-type="string">
            <text:p>Disruption effect by interception:</text:p>
          </table:table-cell>
          <table:table-cell table:style-name="ce30" table:formula="of:=[.K3]*(1+([.E22]/1200))*2*2" office:value-type="float" office:value="5.3" calcext:value-type="float">
            <text:p>5.30</text:p>
          </table:table-cell>
          <table:table-cell table:number-columns-repeated="16373"/>
        </table:table-row>
        <table:table-row table:style-name="ro2">
          <table:table-cell table:style-name="Default" table:number-columns-repeated="5"/>
          <table:table-cell/>
          <table:table-cell office:value-type="string" calcext:value-type="string">
            <text:p>Damage dealt by single plane hit (critical):</text:p>
            <draw:frame table:end-cell-address="Arkusz1.G17" table:end-x="7.536cm" table:end-y="0.377cm" draw:z-index="1" draw:name="Obraz 34" draw:style-name="gr1" draw:text-style-name="P1" svg:width="0.526cm" svg:height="0.377cm" svg:x="7.01cm" svg:y="0cm">
              <draw:image xlink:href="Pictures/20000009000009EC000007251C43EC56.svm" xlink:type="simple" xlink:show="embed" xlink:actuate="onLoad" draw:mime-type="image/x-svm">
                <text:p/>
              </draw:image>
              <draw:image xlink:href="Pictures/10000001000000610000004684E6C66E.png" xlink:type="simple" xlink:show="embed" xlink:actuate="onLoad" draw:mime-type="image/png"/>
            </draw:frame>
            <draw:frame table:end-cell-address="Arkusz1.G17" table:end-x="7.669cm" table:end-y="0.42cm" draw:z-index="85" draw:name="Obraz 30" draw:style-name="gr1" draw:text-style-name="P1" svg:width="0.348cm" svg:height="0.309cm" svg:x="7.321cm" svg:y="0.111cm">
              <draw:image xlink:href="Pictures/100000010000001200000010E8F7B126.png" xlink:type="simple" xlink:show="embed" xlink:actuate="onLoad" draw:mime-type="image/png">
                <text:p/>
              </draw:image>
            </draw:frame>
          </table:table-cell>
          <table:table-cell table:style-name="ce30" table:formula="of:=[.B16]*[.H14]*(1-[.H15])*(1+[.B35])*75%" office:value-type="float" office:value="13.92" calcext:value-type="float">
            <text:p>13.92</text:p>
          </table:table-cell>
          <table:table-cell/>
          <table:table-cell office:value-type="string" calcext:value-type="string">
            <text:p>Disruption reduction ratio:</text:p>
          </table:table-cell>
          <table:table-cell table:style-name="ce24" table:formula="of:=IF([.K16]=0;0;(2*[.K2]*(1+([.B22]/1200))*(1+([.B21]/110))*(1+([.B19]/100))*2)/[.K16])" office:value-type="percentage" office:value="1.66220697541452" calcext:value-type="percentage">
            <text:p>166%</text:p>
          </table:table-cell>
          <table:table-cell table:number-columns-repeated="16373"/>
        </table:table-row>
        <table:table-row table:style-name="ro2">
          <table:table-cell table:style-name="ce19" office:value-type="string" calcext:value-type="string" table:number-columns-spanned="2" table:number-rows-spanned="1">
            <text:p>Fighter Plane stats</text:p>
          </table:table-cell>
          <table:covered-table-cell/>
          <table:table-cell/>
          <table:table-cell table:style-name="ce19" office:value-type="string" calcext:value-type="string" table:number-columns-spanned="2" table:number-rows-spanned="1">
            <text:p>Fighter Plane stats</text:p>
          </table:table-cell>
          <table:covered-table-cell table:style-name="ce27"/>
          <table:table-cell/>
          <table:table-cell office:value-type="string" calcext:value-type="string">
            <text:p>Mean damage dealt by regular hits:</text:p>
            <draw:frame table:end-cell-address="Arkusz1.G18" table:end-x="7.538cm" table:end-y="0.422cm" draw:z-index="2" draw:name="Obraz 31" draw:style-name="gr1" draw:text-style-name="P1" svg:width="0.422cm" svg:height="0.422cm" svg:x="7.116cm" svg:y="0cm">
              <draw:image xlink:href="Pictures/100000010000001000000010B1E1AE33.png" xlink:type="simple" xlink:show="embed" xlink:actuate="onLoad" draw:mime-type="image/png">
                <text:p/>
              </draw:image>
            </draw:frame>
          </table:table-cell>
          <table:table-cell table:style-name="ce30" table:formula="of:=[.H16]*[.H13]" office:value-type="float" office:value="0" calcext:value-type="float">
            <text:p>0.00</text:p>
          </table:table-cell>
          <table:table-cell/>
          <table:table-cell table:style-name="Default" office:value-type="string" calcext:value-type="string">
            <text:p>Disruption by interception:</text:p>
          </table:table-cell>
          <table:table-cell table:style-name="ce48" table:formula="of:=IF(([.K16]-([.K16]*[.K17]))&lt;0;0;([.K16]-([.K16]*[.K17])))" office:value-type="float" office:value="0" calcext:value-type="float">
            <text:p>0.00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ir Attack</text:p>
          </table:table-cell>
          <table:table-cell table:style-name="ce22" office:value-type="float" office:value="15" calcext:value-type="float">
            <text:p>15.0</text:p>
          </table:table-cell>
          <table:table-cell/>
          <table:table-cell office:value-type="string" calcext:value-type="string">
            <text:p>Air Attack</text:p>
          </table:table-cell>
          <table:table-cell table:style-name="ce22" office:value-type="float" office:value="15" calcext:value-type="float">
            <text:p>15.0</text:p>
          </table:table-cell>
          <table:table-cell/>
          <table:table-cell office:value-type="string" calcext:value-type="string">
            <text:p>Mean damage dealt by critical hits:</text:p>
            <draw:frame table:end-cell-address="Arkusz1.G19" table:end-x="7.591cm" table:end-y="0.421cm" draw:z-index="3" draw:name="Obraz 32" draw:style-name="gr1" draw:text-style-name="P1" svg:width="0.475cm" svg:height="0.421cm" svg:x="7.116cm" svg:y="0cm">
              <draw:image xlink:href="Pictures/100000010000001200000010E8F7B126.png" xlink:type="simple" xlink:show="embed" xlink:actuate="onLoad" draw:mime-type="image/png">
                <text:p/>
              </draw:image>
            </draw:frame>
          </table:table-cell>
          <table:table-cell table:style-name="ce30" table:formula="of:=[.H12]*[.H17]" office:value-type="float" office:value="0" calcext:value-type="float">
            <text:p>0.00</text:p>
          </table:table-cell>
          <table:table-cell/>
          <table:table-cell table:style-name="ce43" office:value-type="string" calcext:value-type="string">
            <text:p>Planes destroyed by fighters:</text:p>
          </table:table-cell>
          <table:table-cell table:style-name="ce49" table:formula="of:=IF([.B14]=0;[.K4];IF((([.K7]-[.K8]+[.K9]+[.K10])*5*0.01/[.B14])&lt;0.001;0.001;((([.K7]-[.K8]+[.K9]+[.K10])*5*0.01)/[.B14])))" office:value-type="float" office:value="0.001" calcext:value-type="float">
            <text:p>0.00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ir Defence</text:p>
            <draw:frame draw:z-index="86" draw:name="Obraz 90" draw:style-name="gr1" draw:text-style-name="P1" svg:width="0.951cm" svg:height="0.422cm" svg:x="3cm" svg:y="0cm">
              <draw:image xlink:href="Pictures/10000001000000240000001055CD21DF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9" calcext:value-type="float">
            <text:p>9.0</text:p>
          </table:table-cell>
          <table:table-cell/>
          <table:table-cell office:value-type="string" calcext:value-type="string">
            <text:p>Air Defence</text:p>
            <draw:frame draw:z-index="87" draw:name="Obraz 91" draw:style-name="gr1" draw:text-style-name="P1" svg:width="0.951cm" svg:height="0.422cm" svg:x="2.8cm" svg:y="0cm">
              <draw:image xlink:href="Pictures/10000001000000240000001055CD21DF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9" calcext:value-type="float">
            <text:p>9.0</text:p>
          </table:table-cell>
          <table:table-cell/>
          <table:table-cell office:value-type="string" calcext:value-type="string">
            <text:p>Mean damage dealt by 1<text:span text:style-name="T3">st</text:span> strike:</text:p>
          </table:table-cell>
          <table:table-cell table:style-name="ce30" table:formula="of:=[.H18]+[.H19]" office:value-type="float" office:value="0" calcext:value-type="float">
            <text:p>0.00</text:p>
          </table:table-cell>
          <table:table-cell/>
          <table:table-cell table:style-name="ce46" office:value-type="string" calcext:value-type="string">
            <text:p>Planes destroyed by bombers:</text:p>
          </table:table-cell>
          <table:table-cell table:style-name="ce49" table:formula="of:=IF([.B14]=0;[.K4];IF((([.K12]-[.K13]+[.K14]+[.K15])*5*0.01/[.B14])&lt;0.001;0.001;((([.K12]-[.K13]+[.K14]+[.K15])*5*0.01)/[.B14])))" office:value-type="float" office:value="0.001" calcext:value-type="float">
            <text:p>0.00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ean damage dealt by 2<text:span text:style-name="T3">nd</text:span> strike:</text:p>
          </table:table-cell>
          <table:table-cell table:style-name="ce30" table:formula="of:=IF([.H3]&gt;0;(([.H6]-([.H5]*[.H4])-[.K21])*[.H7]*(1-[.H11])*[.H16])+(([.H6]-([.H5]*[.H4])-[.K21])*[.H7]*[.H11]*[.H17]);0)" office:value-type="float" office:value="0" calcext:value-type="float">
            <text:p>0.00</text:p>
          </table:table-cell>
          <table:table-cell/>
          <table:table-cell table:style-name="Default" office:value-type="string" calcext:value-type="string">
            <text:p>Destroyed planes:</text:p>
          </table:table-cell>
          <table:table-cell table:style-name="ce59" table:formula="of:=[.K19]+[.K20]" office:value-type="float" office:value="0.002" calcext:value-type="float">
            <text:p>0.00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peed</text:p>
            <draw:frame draw:z-index="88" draw:name="Obraz 88" draw:style-name="gr1" draw:text-style-name="P1" svg:width="0.634cm" svg:height="0.422cm" svg:x="3.2cm" svg:y="0.002cm">
              <draw:image xlink:href="Pictures/10000001000000180000001094DFF98C.png" xlink:type="simple" xlink:show="embed" xlink:actuate="onLoad" draw:mime-type="image/png">
                <text:p/>
              </draw:image>
            </draw:frame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Speed</text:p>
            <draw:frame draw:z-index="89" draw:name="Obraz 89" draw:style-name="gr1" draw:text-style-name="P1" svg:width="0.634cm" svg:height="0.422cm" svg:x="2.993cm" svg:y="0.002cm">
              <draw:image xlink:href="Pictures/10000001000000180000001094DFF98C.png" xlink:type="simple" xlink:show="embed" xlink:actuate="onLoad" draw:mime-type="image/png">
                <text:p/>
              </draw:image>
            </draw:frame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Mean amount of planes on 3<text:span text:style-name="T3">rd</text:span> (night) strike:</text:p>
            <draw:frame table:end-cell-address="Arkusz1.G22" table:end-x="7.591cm" table:end-y="0.421cm" draw:z-index="90" draw:name="Obraz 51" draw:style-name="gr1" draw:text-style-name="P1" svg:width="0.369cm" svg:height="0.421cm" svg:x="7.222cm" svg:y="0cm">
              <draw:image xlink:href="Pictures/100000010000000E0000001050304E56.png" xlink:type="simple" xlink:show="embed" xlink:actuate="onLoad" draw:mime-type="image/png">
                <text:p/>
              </draw:image>
            </draw:frame>
          </table:table-cell>
          <table:table-cell table:style-name="ce30" table:formula="of:=IF([.H3]&gt;0;([.B4]-([.H2]-(([.H2]-([.H5]*[.H4])-[.K21])-([.H5]*[.H4])-[.K21])))*[.B34]*[.B6]*(1+[.B27])*(1-80%+[.B26]);0)" office:value-type="float" office:value="0" calcext:value-type="float">
            <text:p>0.00</text:p>
          </table:table-cell>
          <table:table-cell/>
          <table:table-cell table:style-name="Default" office:value-type="string" calcext:value-type="string">
            <text:p>Disruption defence factor:</text:p>
          </table:table-cell>
          <table:table-cell table:style-name="ce48" table:formula="of:=[.B14]/200" office:value-type="float" office:value="0.05" calcext:value-type="float">
            <text:p>0.05</text:p>
          </table:table-cell>
          <table:table-cell table:number-columns-repeated="16373"/>
        </table:table-row>
        <table:table-row table:style-name="ro2">
          <table:table-cell table:number-columns-repeated="6"/>
          <table:table-cell office:value-type="string" calcext:value-type="string">
            <text:p>Mean damage dealt by 3<text:span text:style-name="T3">rd</text:span> (night) strike:</text:p>
            <draw:frame table:end-cell-address="Arkusz1.G25" table:end-x="7.715cm" table:end-y="0.03cm" draw:z-index="4" draw:name="Obraz 53" draw:style-name="gr1" draw:text-style-name="P1" svg:width="0.604cm" svg:height="0.583cm" svg:x="7.111cm" svg:y="0.35cm">
              <draw:image xlink:href="Pictures/1000000100000016000000169EFC10BE.png" xlink:type="simple" xlink:show="embed" xlink:actuate="onLoad" draw:mime-type="image/png">
                <text:p/>
              </draw:image>
            </draw:frame>
            <draw:frame table:end-cell-address="Arkusz1.G23" table:end-x="7.591cm" table:end-y="0.422cm" draw:z-index="91" draw:name="Obraz 52" draw:style-name="gr1" draw:text-style-name="P1" svg:width="0.369cm" svg:height="0.422cm" svg:x="7.222cm" svg:y="0cm">
              <draw:image xlink:href="Pictures/100000010000000E0000001050304E56.png" xlink:type="simple" xlink:show="embed" xlink:actuate="onLoad" draw:mime-type="image/png">
                <text:p/>
              </draw:image>
            </draw:frame>
          </table:table-cell>
          <table:table-cell table:style-name="ce30" table:formula="of:=([.H22]*[.H7]*(1-[.H11])*[.H16])+([.H22]*[.H7]*[.H11]*[.H17])" office:value-type="float" office:value="0" calcext:value-type="float">
            <text:p>0.00</text:p>
          </table:table-cell>
          <table:table-cell/>
          <table:table-cell table:style-name="Default" office:value-type="string" calcext:value-type="string">
            <text:p>Disruption attack factor:</text:p>
          </table:table-cell>
          <table:table-cell table:style-name="ce48" table:formula="of:=[.B11]/200" office:value-type="float" office:value="0.0225" calcext:value-type="float">
            <text:p>0.02</text:p>
          </table:table-cell>
          <table:table-cell table:number-columns-repeated="16373"/>
        </table:table-row>
        <table:table-row table:style-name="ro2">
          <table:table-cell table:style-name="ce20" office:value-type="string" calcext:value-type="string" table:number-columns-spanned="2" table:number-rows-spanned="1">
            <text:p>Fleet/Local stats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Fleet/Local stats</text:p>
          </table:table-cell>
          <table:covered-table-cell/>
          <table:table-cell/>
          <table:table-cell office:value-type="string" calcext:value-type="string">
            <text:p>Mean damage dealt in 24 hours:</text:p>
          </table:table-cell>
          <table:table-cell table:style-name="ce30" table:formula="of:=[.H20]+[.H21]+[.H23]" office:value-type="float" office:value="0" calcext:value-type="float">
            <text:p>0.00</text:p>
          </table:table-cell>
          <table:table-cell/>
          <table:table-cell table:style-name="Default" office:value-type="string" calcext:value-type="string">
            <text:p>Disruption speed factor:</text:p>
          </table:table-cell>
          <table:table-cell table:style-name="ce48" table:formula="of:=[.B13]/1200" office:value-type="float" office:value="0.191666666666667" calcext:value-type="float">
            <office:annotation draw:style-name="gr8" svg:width="2.899cm" svg:height="1.799cm" svg:x="37.121cm" svg:y="9.089cm" draw:caption-point-x="-0.61cm" draw:caption-point-y="1.51cm">
              <dc:creator>Nieznany autor</dc:creator>
              <dc:date>2024-12-11T00:00:00</dc:date>
              <text:p>Change: 1200 instead of 800</text:p>
              <text:p>1200/1 = 1200</text:p>
            </office:annotation>
            <text:p>0.1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leet Anti-air</text:p>
          </table:table-cell>
          <table:table-cell table:style-name="ce22" office:value-type="float" office:value="0" calcext:value-type="float">
            <text:p>0.0</text:p>
          </table:table-cell>
          <table:table-cell/>
          <table:table-cell office:value-type="string" calcext:value-type="string">
            <text:p>Fleet Anti-air</text:p>
          </table:table-cell>
          <table:table-cell table:style-name="ce22" office:value-type="float" office:value="0" calcext:value-type="float">
            <text:p>0.0</text:p>
          </table:table-cell>
          <table:table-cell table:number-columns-repeated="4"/>
          <table:table-cell office:value-type="string" calcext:value-type="string">
            <text:p>Disruption damage factor:</text:p>
          </table:table-cell>
          <table:table-cell table:style-name="ce29" table:formula="of:=IF([.K4]=0;1;(100%-(SQRT([.K18]/(10*[.K4]*(1+[.K22])*(1+[.K23])*(1+[.K24]))))))" office:value-type="percentage" office:value="1" calcext:value-type="percentage">
            <office:annotation draw:style-name="gr8" svg:width="2.899cm" svg:height="1.799cm" svg:x="37.121cm" svg:y="9.54cm" draw:caption-point-x="-0.61cm" draw:caption-point-y="1.51cm">
              <dc:creator>Nieznany autor</dc:creator>
              <dc:date>2024-12-11T00:00:00</dc:date>
              <text:p>Ratio of undisrupted planes</text:p>
            </office:annotation>
            <text:p>100.00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Carrier traffic</text:p>
          </table:table-cell>
          <table:table-cell table:style-name="ce24" table:formula="of:=IF([.B37]=&quot;Clear&quot;;0;-0.05)" office:value-type="percentage" office:value="0" calcext:value-type="percentage">
            <text:p>0%</text:p>
          </table:table-cell>
          <table:table-cell/>
          <table:table-cell office:value-type="string" calcext:value-type="string">
            <text:p>Carrier traffic</text:p>
          </table:table-cell>
          <table:table-cell table:style-name="ce24" table:formula="of:=IF([.B37]=&quot;Clear&quot;;0;-0.05)" office:value-type="percentage" office:value="0" calcext:value-type="percentage">
            <text:p>0%</text:p>
          </table:table-cell>
          <table:table-cell table:number-columns-repeated="2"/>
          <table:table-cell table:style-name="ce30" table:formula="of:=[.H20]*2" office:value-type="float" office:value="0" calcext:value-type="float">
            <text:p>0.00</text:p>
          </table:table-cell>
          <table:table-cell/>
          <table:table-cell table:style-name="ce30" office:value-type="string" calcext:value-type="string">
            <text:p>“Reported” disruption:</text:p>
          </table:table-cell>
          <table:table-cell table:style-name="ce29" table:formula="of:=1-[.K25]" office:value-type="percentage" office:value="0" calcext:value-type="percentage">
            <office:annotation draw:style-name="gr4" svg:width="2.899cm" svg:height="2.176cm" svg:x="37.121cm" svg:y="9.992cm" draw:caption-point-x="-0.61cm" draw:caption-point-y="1.51cm">
              <dc:creator>Nieznany autor</dc:creator>
              <dc:date>2024-12-11T00:00:00</dc:date>
              <text:p>Ratio of planes disrupted (only displayed in normal air battles)</text:p>
            </office:annotation>
            <text:p>0.00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Naval strikes</text:p>
          </table:table-cell>
          <table:table-cell table:style-name="ce24" table:formula="of:=IF([.B37]=&quot;Clear&quot;;0;IF([.B37]=&quot;Rain&quot;;-0.15;-0.3))" office:value-type="percentage" office:value="0" calcext:value-type="percentage">
            <text:p>0%</text:p>
          </table:table-cell>
          <table:table-cell/>
          <table:table-cell office:value-type="string" calcext:value-type="string">
            <text:p>Naval strikes</text:p>
          </table:table-cell>
          <table:table-cell table:style-name="ce24" table:formula="of:=IF([.B37]=&quot;Clear&quot;;0;IF([.B37]=&quot;Rain&quot;;-0.15;-0.3))" office:value-type="percentage" office:value="0" calcext:value-type="percentage">
            <text:p>0%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ighters sortie efficiency</text:p>
          </table:table-cell>
          <table:table-cell table:style-name="ce24" office:value-type="percentage" office:value="0.15" calcext:value-type="percentage">
            <text:p>15%</text:p>
          </table:table-cell>
          <table:table-cell/>
          <table:table-cell office:value-type="string" calcext:value-type="string">
            <text:p>Fighters sortie efficiency</text:p>
          </table:table-cell>
          <table:table-cell table:style-name="ce24" office:value-type="percentage" office:value="0.15" calcext:value-type="percentage">
            <text:p>15%</text:p>
          </table:table-cell>
          <table:table-cell/>
          <table:table-cell table:style-name="Default" table:number-columns-repeated="2"/>
          <table:table-cell>
            <draw:frame draw:z-index="92" draw:name="Obraz 56" draw:style-name="gr1" draw:text-style-name="P1" svg:width="0.627cm" svg:height="0.546cm" svg:x="1.223cm" svg:y="0.341cm">
              <draw:image xlink:href="Pictures/20000009000009EC000008A43AF4CB4D.svm" xlink:type="simple" xlink:show="embed" xlink:actuate="onLoad" draw:mime-type="image/x-svm">
                <text:p/>
              </draw:image>
              <draw:image xlink:href="Pictures/1000000100000061000000557C9F5670.png" xlink:type="simple" xlink:show="embed" xlink:actuate="onLoad" draw:mime-type="image/png"/>
            </draw:frame>
          </table:table-cell>
          <table:table-cell table:number-columns-repeated="16375"/>
        </table:table-row>
        <table:table-row table:style-name="ro2">
          <table:table-cell table:number-columns-repeated="6"/>
          <table:table-cell>
            <draw:frame draw:z-index="5" draw:name="Obraz 98" draw:style-name="gr1" draw:text-style-name="P1" svg:width="0.422cm" svg:height="0.422cm" svg:x="0.699cm" svg:y="0.099cm">
              <draw:image xlink:href="Pictures/100000010000001000000010B1E1AE33.png" xlink:type="simple" xlink:show="embed" xlink:actuate="onLoad" draw:mime-type="image/png">
                <text:p/>
              </draw:image>
            </draw:frame>
            <draw:frame draw:z-index="93" draw:name="Obraz 68" draw:style-name="gr1" draw:text-style-name="P1" svg:width="0.911cm" svg:height="0.183cm" draw:transform="skewX (-0.027401669256311) rotate (-0.239982772149221) translate (0.397cm 0.026cm)">
              <draw:image xlink:href="Pictures/1000000100000022000000075CD6957F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 table:number-columns-spanned="2" table:number-rows-spanned="1">
            <text:p>Country stats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Country stats</text:p>
          </table:table-cell>
          <table:covered-table-cell/>
          <table:table-cell/>
          <table:table-cell>
            <draw:frame draw:z-index="6" draw:name="Obraz 17" draw:style-name="gr1" draw:text-style-name="P1" svg:width="0.932cm" svg:height="0.185cm" svg:x="4.715cm" svg:y="0.15cm">
              <draw:image xlink:href="Pictures/1000000100000022000000075CD6957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formula="of:=[.K30]*0.05/[.B20]" office:value-type="float" office:value="0.0166666666666667" calcext:value-type="float">
            <text:p>0.0166666666666667</text:p>
          </table:table-cell>
          <table:table-cell table:formula="of:=[.E19]*0.2*[.L30]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Critical hit chance</text:p>
            <draw:frame draw:z-index="94" draw:name="Obraz 29" draw:style-name="gr1" draw:text-style-name="P1" svg:width="0.309cm" svg:height="0.269cm" svg:x="3.601cm" svg:y="0.196cm">
              <draw:image xlink:href="Pictures/20000009000009EC000008A43AF4CB4D.svm" xlink:type="simple" xlink:show="embed" xlink:actuate="onLoad" draw:mime-type="image/x-svm">
                <text:p/>
              </draw:image>
              <draw:image xlink:href="Pictures/1000000100000061000000557C9F5670.png" xlink:type="simple" xlink:show="embed" xlink:actuate="onLoad" draw:mime-type="image/png"/>
            </draw:frame>
          </table:table-cell>
          <table:table-cell table:style-name="ce24" office:value-type="percentage" office:value="0" calcext:value-type="percentage">
            <text:p>0%</text:p>
          </table:table-cell>
          <table:table-cell/>
          <table:table-cell office:value-type="string" calcext:value-type="string">
            <text:p>Critical hit chance</text:p>
            <draw:frame draw:z-index="95" draw:name="Obraz 76" draw:style-name="gr1" draw:text-style-name="P1" svg:width="0.309cm" svg:height="0.269cm" svg:x="3.36cm" svg:y="0.196cm">
              <draw:image xlink:href="Pictures/20000009000009EC000008A43AF4CB4D.svm" xlink:type="simple" xlink:show="embed" xlink:actuate="onLoad" draw:mime-type="image/x-svm">
                <text:p/>
              </draw:image>
              <draw:image xlink:href="Pictures/1000000100000061000000557C9F5670.png" xlink:type="simple" xlink:show="embed" xlink:actuate="onLoad" draw:mime-type="image/png"/>
            </draw:frame>
          </table:table-cell>
          <table:table-cell table:style-name="ce24" office:value-type="percentage" office:value="0" calcext:value-type="percentage">
            <text:p>0%</text:p>
          </table:table-cell>
          <table:table-cell>
            <draw:frame draw:z-index="96" draw:name="Obraz 55" draw:style-name="gr3" draw:text-style-name="P1" svg:width="0.933cm" svg:height="0.371cm" svg:x="2.216cm" svg:y="0.001cm">
              <draw:image xlink:href="Pictures/10000001000000220000000EAB310434.png" xlink:type="simple" xlink:show="embed" xlink:actuate="onLoad" draw:mime-type="image/png">
                <text:p/>
              </draw:image>
            </draw:frame>
          </table:table-cell>
          <table:table-cell>
            <draw:frame draw:z-index="97" draw:name="Obraz 62" draw:style-name="gr3" draw:text-style-name="P1" svg:width="0.961cm" svg:height="0.504cm" svg:x="1.095cm" svg:y="0cm">
              <draw:image xlink:href="Pictures/100000010000002300000013C77DDD5D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98" draw:name="Obraz 6" draw:style-name="gr1" draw:text-style-name="P1" svg:width="0.634cm" svg:height="0.422cm" svg:x="1.624cm" svg:y="0.178cm">
              <draw:image xlink:href="Pictures/10000001000000180000001076725A5E.png" xlink:type="simple" xlink:show="embed" xlink:actuate="onLoad" draw:mime-type="image/png">
                <text:p/>
              </draw:image>
            </draw:frame>
          </table:table-cell>
          <table:table-cell table:formula="of:=1/[.J30]" office:value-type="float" office:value="60" calcext:value-type="float">
            <text:p>6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h. to receive crit. Hit</text:p>
          </table:table-cell>
          <table:table-cell table:style-name="ce24" office:value-type="percentage" office:value="0" calcext:value-type="percentage">
            <text:p>0%</text:p>
          </table:table-cell>
          <table:table-cell/>
          <table:table-cell office:value-type="string" calcext:value-type="string">
            <text:p>Ch. to receive crit. Hit</text:p>
            <draw:frame draw:z-index="99" draw:name="Obraz 77" draw:style-name="gr1" draw:text-style-name="P1" svg:width="0.475cm" svg:height="0.422cm" svg:x="3.23cm" svg:y="0cm">
              <draw:image xlink:href="Pictures/100000010000001200000010E8F7B126.png" xlink:type="simple" xlink:show="embed" xlink:actuate="onLoad" draw:mime-type="image/png">
                <text:p/>
              </draw:image>
            </draw:frame>
          </table:table-cell>
          <table:table-cell table:style-name="ce24" office:value-type="percentage" office:value="0" calcext:value-type="percentage">
            <text:p>0%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ffects on critical hit</text:p>
          </table:table-cell>
          <table:table-cell table:style-name="ce24" office:value-type="percentage" office:value="0" calcext:value-type="percentage">
            <text:p>0%</text:p>
          </table:table-cell>
          <table:table-cell/>
          <table:table-cell office:value-type="string" calcext:value-type="string">
            <text:p>Effects on critical hit</text:p>
          </table:table-cell>
          <table:table-cell table:style-name="ce24" office:value-type="percentage" office:value="0" calcext:value-type="percentage">
            <text:p>0%</text:p>
          </table:table-cell>
          <table:table-cell/>
          <table:table-cell>
            <draw:frame draw:z-index="7" draw:name="Obraz 99" draw:style-name="gr1" draw:text-style-name="P1" svg:width="0.961cm" svg:height="0.504cm" svg:x="0cm" svg:y="-0.001cm">
              <draw:image xlink:href="Pictures/100000010000002300000013C77DDD5D.png" xlink:type="simple" xlink:show="embed" xlink:actuate="onLoad" draw:mime-type="image/png">
                <text:p/>
              </draw:image>
            </draw:frame>
            <draw:frame draw:z-index="100" draw:name="Obraz 100" draw:style-name="gr1" draw:text-style-name="P1" svg:width="0.422cm" svg:height="0.422cm" svg:x="0.499cm" svg:y="0.099cm">
              <draw:image xlink:href="Pictures/100000010000001000000010B1E1AE33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rtie efficiency</text:p>
          </table:table-cell>
          <table:table-cell table:style-name="ce24" office:value-type="percentage" office:value="0.5" calcext:value-type="percentage">
            <text:p>50%</text:p>
          </table:table-cell>
          <table:table-cell/>
          <table:table-cell office:value-type="string" calcext:value-type="string">
            <text:p>Sortie efficiency</text:p>
          </table:table-cell>
          <table:table-cell table:style-name="ce24" office:value-type="percentage" office:value="0.5" calcext:value-type="percentage">
            <text:p>50%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val Air Attacks</text:p>
          </table:table-cell>
          <table:table-cell table:style-name="ce24" office:value-type="percentage" office:value="0" calcext:value-type="percentage">
            <text:p>0%</text:p>
          </table:table-cell>
          <table:table-cell/>
          <table:table-cell office:value-type="string" calcext:value-type="string">
            <text:p>Naval Air Attacks</text:p>
          </table:table-cell>
          <table:table-cell table:style-name="ce24" office:value-type="percentage" office:value="0" calcext:value-type="percentage">
            <text:p>0%</text:p>
          </table:table-cell>
          <table:table-cell table:number-columns-repeated="3"/>
          <table:table-cell office:value-type="string" calcext:value-type="string">
            <text:p><text:span text:style-name="T4">Designed</text:span> HP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esigned ORG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ORG damage done by a single regular plane hit:</text:p>
          </table:table-cell>
          <table:table-cell table:formula="of:=[.H16]/75%*84%" office:value-type="float" office:value="6.72" calcext:value-type="float">
            <text:p>6.72</text:p>
          </table:table-cell>
          <table:table-cell office:value-type="string" calcext:value-type="string">
            <text:p>Current HP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Current ORG</text:p>
          </table:table-cell>
          <table:table-cell office:value-type="float" office:value="31.6" calcext:value-type="float">
            <text:p>31.6</text:p>
          </table:table-cell>
          <table:table-cell table:number-columns-repeated="16372"/>
        </table:table-row>
        <table:table-row table:style-name="ro2">
          <table:table-cell table:style-name="ce21" office:value-type="string" calcext:value-type="string">
            <text:p>Weather</text:p>
          </table:table-cell>
          <table:table-cell table:style-name="ce25" table:content-validation-name="val1" office:value-type="string" calcext:value-type="string">
            <text:p>Clear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HP Loss</text:p>
          </table:table-cell>
          <table:table-cell table:formula="of:=[.J35]-[.J36]" office:value-type="float" office:value="63" calcext:value-type="float">
            <text:p>63</text:p>
          </table:table-cell>
          <table:table-cell office:value-type="string" calcext:value-type="string">
            <text:p>ORG Loss</text:p>
          </table:table-cell>
          <table:table-cell table:formula="of:=[.L35]-[.L36]" office:value-type="float" office:value="10.4" calcext:value-type="float">
            <text:p>10.4</text:p>
          </table:table-cell>
          <table:table-cell table:number-columns-repeated="16372"/>
        </table:table-row>
        <table:table-row table:style-name="ro2">
          <table:table-cell table:style-name="Default" table:number-columns-repeated="9"/>
          <table:table-cell table:formula="of:=[.J37]/2" office:value-type="float" office:value="31.5" calcext:value-type="float">
            <text:p>31.5</text:p>
          </table:table-cell>
          <table:table-cell table:formula="of:=[.J37]/[.L37]" office:value-type="float" office:value="6.05769230769231" calcext:value-type="float">
            <text:p>6.0576923076923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Equipment 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% of total</text:p>
          </table:table-cell>
          <table:table-cell office:value-type="string" calcext:value-type="string">
            <text:p>Production cost</text:p>
          </table:table-cell>
          <table:table-cell office:value-type="string" calcext:value-type="string">
            <text:p>Cost of eq</text:p>
          </table:table-cell>
          <table:table-cell office:value-type="string" calcext:value-type="string">
            <text:p>% of total cost</text:p>
          </table:table-cell>
          <table:table-cell office:value-type="string" calcext:value-type="string">
            <text:p>Factories to be assigned</text:p>
          </table:table-cell>
          <table:table-cell table:number-columns-repeated="2"/>
          <table:table-cell table:style-name="Default" table:number-columns-repeated="3"/>
          <table:table-cell table:number-columns-repeated="16372"/>
        </table:table-row>
        <table:table-row table:style-name="ro2">
          <table:table-cell office:value-type="string" calcext:value-type="string">
            <text:p>Infantry eq</text:p>
          </table:table-cell>
          <table:table-cell office:value-type="float" office:value="519" calcext:value-type="float">
            <text:p>519</text:p>
          </table:table-cell>
          <table:table-cell table:style-name="ce29" table:formula="of:=[.B40]/[.$B$49]" office:value-type="percentage" office:value="0.400462962962963" calcext:value-type="percentage">
            <text:p>40.05%</text:p>
          </table:table-cell>
          <table:table-cell office:value-type="float" office:value="2.11" calcext:value-type="float">
            <text:p>2.11</text:p>
          </table:table-cell>
          <table:table-cell table:formula="of:=[.B40]*[.D40]" office:value-type="float" office:value="1095.09" calcext:value-type="float">
            <text:p>1095.09</text:p>
          </table:table-cell>
          <table:table-cell table:style-name="ce29" table:formula="of:=[.E40]/[.$E$49]" office:value-type="percentage" office:value="0.365238185765887" calcext:value-type="percentage">
            <text:p>36.52%</text:p>
          </table:table-cell>
          <table:table-cell table:style-name="ce30" table:formula="of:=[.F40]*[.$B$50]" office:value-type="float" office:value="19.357623845592" calcext:value-type="float">
            <text:p>19.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o eq</text:p>
          </table:table-cell>
          <table:table-cell office:value-type="float" office:value="87" calcext:value-type="float">
            <text:p>87</text:p>
          </table:table-cell>
          <table:table-cell table:style-name="ce29" table:formula="of:=[.B41]/[.$B$49]" office:value-type="percentage" office:value="0.0671296296296296" calcext:value-type="percentage">
            <text:p>6.71%</text:p>
          </table:table-cell>
          <table:table-cell office:value-type="float" office:value="2.85" calcext:value-type="float">
            <text:p>2.85</text:p>
          </table:table-cell>
          <table:table-cell table:formula="of:=[.B41]*[.D41]" office:value-type="float" office:value="247.95" calcext:value-type="float">
            <text:p>247.95</text:p>
          </table:table-cell>
          <table:table-cell table:style-name="ce29" table:formula="of:=[.E41]/[.$E$49]" office:value-type="percentage" office:value="0.0826971373682999" calcext:value-type="percentage">
            <text:p>8.27%</text:p>
          </table:table-cell>
          <table:table-cell table:style-name="ce30" table:formula="of:=[.F41]*[.$B$50]" office:value-type="float" office:value="4.3829482805199" calcext:value-type="float">
            <text:p>4.38</text:p>
          </table:table-cell>
          <table:table-cell table:number-columns-repeated="4"/>
          <table:table-cell office:value-type="float" office:value="8.3" calcext:value-type="float">
            <text:p>8.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upport eq</text:p>
          </table:table-cell>
          <table:table-cell office:value-type="float" office:value="70" calcext:value-type="float">
            <text:p>70</text:p>
          </table:table-cell>
          <table:table-cell table:style-name="ce29" table:formula="of:=[.B42]/[.$B$49]" office:value-type="percentage" office:value="0.0540123456790123" calcext:value-type="percentage">
            <text:p>5.40%</text:p>
          </table:table-cell>
          <table:table-cell office:value-type="float" office:value="5.42" calcext:value-type="float">
            <text:p>5.42</text:p>
          </table:table-cell>
          <table:table-cell table:formula="of:=[.B42]*[.D42]" office:value-type="float" office:value="379.4" calcext:value-type="float">
            <text:p>379.4</text:p>
          </table:table-cell>
          <table:table-cell table:style-name="ce29" table:formula="of:=[.E42]/[.$E$49]" office:value-type="percentage" office:value="0.126538793779121" calcext:value-type="percentage">
            <text:p>12.65%</text:p>
          </table:table-cell>
          <table:table-cell table:style-name="ce30" table:formula="of:=[.F42]*[.$B$50]" office:value-type="float" office:value="6.7065560702934" calcext:value-type="float">
            <text:p>6.71</text:p>
          </table:table-cell>
          <table:table-cell table:number-columns-repeated="4"/>
          <table:table-cell office:value-type="float" office:value="8.3" calcext:value-type="float">
            <text:p>8.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Field gear</text:p>
          </table:table-cell>
          <table:table-cell office:value-type="float" office:value="306" calcext:value-type="float">
            <text:p>306</text:p>
          </table:table-cell>
          <table:table-cell table:style-name="ce29" table:formula="of:=[.B43]/[.$B$49]" office:value-type="percentage" office:value="0.236111111111111" calcext:value-type="percentage">
            <text:p>23.61%</text:p>
          </table:table-cell>
          <table:table-cell office:value-type="float" office:value="1.53" calcext:value-type="float">
            <text:p>1.53</text:p>
          </table:table-cell>
          <table:table-cell table:formula="of:=[.B43]*[.D43]" office:value-type="float" office:value="468.18" calcext:value-type="float">
            <text:p>468.18</text:p>
          </table:table-cell>
          <table:table-cell table:style-name="ce29" table:formula="of:=[.E43]/[.$E$49]" office:value-type="percentage" office:value="0.156149004932812" calcext:value-type="percentage">
            <text:p>15.61%</text:p>
          </table:table-cell>
          <table:table-cell table:style-name="ce30" table:formula="of:=[.F43]*[.$B$50]" office:value-type="float" office:value="8.27589726143902" calcext:value-type="float">
            <text:p>8.28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Horses</text:p>
          </table:table-cell>
          <table:table-cell office:value-type="float" office:value="153" calcext:value-type="float">
            <text:p>153</text:p>
          </table:table-cell>
          <table:table-cell table:style-name="ce29" table:formula="of:=[.B44]/[.$B$49]" office:value-type="percentage" office:value="0.118055555555556" calcext:value-type="percentage">
            <text:p>11.81%</text:p>
          </table:table-cell>
          <table:table-cell office:value-type="float" office:value="1.33" calcext:value-type="float">
            <text:p>1.33</text:p>
          </table:table-cell>
          <table:table-cell table:formula="of:=[.B44]*[.D44]" office:value-type="float" office:value="203.49" calcext:value-type="float">
            <text:p>203.49</text:p>
          </table:table-cell>
          <table:table-cell table:style-name="ce29" table:formula="of:=[.E44]/[.$E$49]" office:value-type="percentage" office:value="0.0678686851505358" calcext:value-type="percentage">
            <text:p>6.79%</text:p>
          </table:table-cell>
          <table:table-cell table:style-name="ce30" table:formula="of:=[.F44]*[.$B$50]" office:value-type="float" office:value="3.5970403129784" calcext:value-type="float">
            <text:p>3.60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port v.</text:p>
          </table:table-cell>
          <table:table-cell office:value-type="float" office:value="48" calcext:value-type="float">
            <text:p>48</text:p>
          </table:table-cell>
          <table:table-cell table:style-name="ce29" table:formula="of:=[.B45]/[.$B$49]" office:value-type="percentage" office:value="0.037037037037037" calcext:value-type="percentage">
            <text:p>3.70%</text:p>
          </table:table-cell>
          <table:table-cell office:value-type="float" office:value="3.77" calcext:value-type="float">
            <text:p>3.77</text:p>
          </table:table-cell>
          <table:table-cell table:formula="of:=[.B45]*[.D45]" office:value-type="float" office:value="180.96" calcext:value-type="float">
            <text:p>180.96</text:p>
          </table:table-cell>
          <table:table-cell table:style-name="ce29" table:formula="of:=[.E45]/[.$E$49]" office:value-type="percentage" office:value="0.0603544020091452" calcext:value-type="percentage">
            <text:p>6.04%</text:p>
          </table:table-cell>
          <table:table-cell table:style-name="ce30" table:formula="of:=[.F45]*[.$B$50]" office:value-type="float" office:value="3.1987833064847" calcext:value-type="float">
            <text:p>3.2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ility v.</text:p>
          </table:table-cell>
          <table:table-cell office:value-type="float" office:value="65" calcext:value-type="float">
            <text:p>65</text:p>
          </table:table-cell>
          <table:table-cell table:style-name="ce29" table:formula="of:=[.B46]/[.$B$49]" office:value-type="percentage" office:value="0.0501543209876543" calcext:value-type="percentage">
            <text:p>5.02%</text:p>
          </table:table-cell>
          <table:table-cell office:value-type="float" office:value="1.7" calcext:value-type="float">
            <text:p>1.7</text:p>
          </table:table-cell>
          <table:table-cell table:formula="of:=[.B46]*[.D46]" office:value-type="float" office:value="110.5" calcext:value-type="float">
            <text:p>110.5</text:p>
          </table:table-cell>
          <table:table-cell table:style-name="ce29" table:formula="of:=[.E46]/[.$E$49]" office:value-type="percentage" office:value="0.0368543403073085" calcext:value-type="percentage">
            <text:p>3.69%</text:p>
          </table:table-cell>
          <table:table-cell table:style-name="ce30" table:formula="of:=[.F46]*[.$B$50]" office:value-type="float" office:value="1.95328003628735" calcext:value-type="float">
            <text:p>1.9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A tower</text:p>
          </table:table-cell>
          <table:table-cell office:value-type="float" office:value="24" calcext:value-type="float">
            <text:p>24</text:p>
          </table:table-cell>
          <table:table-cell table:style-name="ce29" table:formula="of:=[.B47]/[.$B$49]" office:value-type="percentage" office:value="0.0185185185185185" calcext:value-type="percentage">
            <text:p>1.85%</text:p>
          </table:table-cell>
          <table:table-cell office:value-type="float" office:value="6.81" calcext:value-type="float">
            <text:p>6.81</text:p>
          </table:table-cell>
          <table:table-cell table:formula="of:=[.B47]*[.D47]" office:value-type="float" office:value="163.44" calcext:value-type="float">
            <text:p>163.44</text:p>
          </table:table-cell>
          <table:table-cell table:style-name="ce29" table:formula="of:=[.E47]/[.$E$49]" office:value-type="percentage" office:value="0.0545110713106471" calcext:value-type="percentage">
            <text:p>5.45%</text:p>
          </table:table-cell>
          <table:table-cell table:style-name="ce30" table:formula="of:=[.F47]*[.$B$50]" office:value-type="float" office:value="2.88908677946429" calcext:value-type="float">
            <text:p>2.8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llery</text:p>
          </table:table-cell>
          <table:table-cell office:value-type="float" office:value="24" calcext:value-type="float">
            <text:p>24</text:p>
          </table:table-cell>
          <table:table-cell table:style-name="ce29" table:formula="of:=[.B48]/[.$B$49]" office:value-type="percentage" office:value="0.0185185185185185" calcext:value-type="percentage">
            <text:p>1.85%</text:p>
          </table:table-cell>
          <table:table-cell office:value-type="float" office:value="6.22" calcext:value-type="float">
            <text:p>6.22</text:p>
          </table:table-cell>
          <table:table-cell table:formula="of:=[.B48]*[.D48]" office:value-type="float" office:value="149.28" calcext:value-type="float">
            <text:p>149.28</text:p>
          </table:table-cell>
          <table:table-cell table:style-name="ce29" table:formula="of:=[.E48]/[.$E$49]" office:value-type="percentage" office:value="0.0497883793762445" calcext:value-type="percentage">
            <text:p>4.98%</text:p>
          </table:table-cell>
          <table:table-cell table:style-name="ce30" table:formula="of:=[.F48]*[.$B$50]" office:value-type="float" office:value="2.63878410694096" calcext:value-type="float">
            <text:p>2.64</text:p>
          </table:table-cell>
          <table:table-cell table:number-columns-repeated="3"/>
          <table:table-cell office:value-type="float" office:value="10.4" calcext:value-type="float">
            <text:p>10.4</text:p>
          </table:table-cell>
          <table:table-cell table:number-columns-repeated="16373"/>
        </table:table-row>
        <table:table-row table:style-name="ro2">
          <table:table-cell table:style-name="ce13" office:value-type="string" calcext:value-type="string">
            <text:p>Total</text:p>
          </table:table-cell>
          <table:table-cell table:formula="of:=[.B40]+[.B41]+[.B42]+[.B43]+[.B44]+[.B45]+[.B46]+[.B47]+[.B48]" office:value-type="float" office:value="1296" calcext:value-type="float">
            <text:p>1296</text:p>
          </table:table-cell>
          <table:table-cell table:style-name="ce29" table:formula="of:=[.C40]+[.C41]+[.C42]+[.C43]+[.C44]+[.C45]+[.C46]+[.C47]+[.C48]" office:value-type="percentage" office:value="1" calcext:value-type="percentage">
            <text:p>100.00%</text:p>
          </table:table-cell>
          <table:table-cell/>
          <table:table-cell table:formula="of:=[.E40]+[.E41]+[.E42]+[.E43]+[.E44]+[.E45]+[.E46]+[.E47]+[.E48]" office:value-type="float" office:value="2998.29" calcext:value-type="float">
            <text:p>2998.29</text:p>
          </table:table-cell>
          <table:table-cell table:style-name="ce29" table:formula="of:=[.E49]/[.$E$49]" office:value-type="percentage" office:value="1" calcext:value-type="percentage">
            <text:p>100.00%</text:p>
          </table:table-cell>
          <table:table-cell table:formula="of:=[.F49]*[.$B$50]" office:value-type="float" office:value="53" calcext:value-type="float">
            <text:p>53</text:p>
          </table:table-cell>
          <table:table-cell table:number-columns-repeated="16377"/>
        </table:table-row>
        <table:table-row table:style-name="ro2">
          <table:table-cell table:style-name="ce13" office:value-type="string" calcext:value-type="string">
            <text:p>Factories</text:p>
          </table:table-cell>
          <table:table-cell office:value-type="float" office:value="53" calcext:value-type="float">
            <text:p>53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formula="of:=0.1" office:value-type="float" office:value="0.1" calcext:value-type="float">
            <text:p>0.1</text:p>
          </table:table-cell>
          <table:table-cell table:style-name="ce35" table:formula="of:=[.A52]/[.$A$56]" office:value-type="float" office:value="0.0350877192982456" calcext:value-type="float">
            <text:p>0.0351</text:p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formula="of:=[.A52]+0.25" office:value-type="float" office:value="0.35" calcext:value-type="float">
            <text:p>0.35</text:p>
          </table:table-cell>
          <table:table-cell table:style-name="ce35" table:formula="of:=[.A53]/[.$A$56]" office:value-type="float" office:value="0.12280701754386" calcext:value-type="float">
            <text:p>0.1228</text:p>
          </table:table-cell>
          <table:table-cell table:number-columns-repeated="16382"/>
        </table:table-row>
        <table:table-row table:style-name="ro2">
          <table:table-cell table:formula="of:=[.A53]+0.5" office:value-type="float" office:value="0.85" calcext:value-type="float">
            <text:p>0.85</text:p>
          </table:table-cell>
          <table:table-cell table:style-name="ce35" table:formula="of:=[.A54]/[.$A$56]" office:value-type="float" office:value="0.298245614035088" calcext:value-type="float">
            <text:p>0.2982</text:p>
          </table:table-cell>
          <table:table-cell table:number-columns-repeated="16382"/>
        </table:table-row>
        <table:table-row table:style-name="ro2">
          <table:table-cell table:formula="of:=[.A54]+1" office:value-type="float" office:value="1.85" calcext:value-type="float">
            <text:p>1.85</text:p>
          </table:table-cell>
          <table:table-cell table:style-name="ce35" table:formula="of:=[.A55]/[.$A$56]" office:value-type="float" office:value="0.649122807017544" calcext:value-type="float">
            <text:p>0.6491</text:p>
          </table:table-cell>
          <table:table-cell table:number-columns-repeated="16382"/>
        </table:table-row>
        <table:table-row table:style-name="ro2">
          <table:table-cell table:formula="of:=[.A55]+1" office:value-type="float" office:value="2.85" calcext:value-type="float">
            <text:p>2.85</text:p>
          </table:table-cell>
          <table:table-cell table:style-name="ce35" table:formula="of:=[.A56]/[.$A$56]" office:value-type="float" office:value="1" calcext:value-type="float">
            <text:p>1.0000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ORG</text:p>
          </table:table-cell>
          <table:table-cell office:value-type="string" calcext:value-type="string">
            <text:p>DMG</text:p>
          </table:table-cell>
          <table:table-cell table:style-name="Default" office:value-type="string" calcext:value-type="string">
            <text:p>HP DMG</text:p>
          </table:table-cell>
          <table:table-cell office:value-type="string" calcext:value-type="string">
            <text:p>ORG DMG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2.5" calcext:value-type="float">
            <text:p>52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29" table:number-columns-repeated="2"/>
          <table:table-cell table:number-columns-repeated="16376"/>
        </table:table-row>
        <table:table-row table:style-name="ro2">
          <table:table-cell/>
          <table:table-cell office:value-type="float" office:value="41.2" calcext:value-type="float">
            <text:p>41.2</text:p>
          </table:table-cell>
          <table:table-cell office:value-type="float" office:value="13.5" calcext:value-type="float">
            <text:p>13.5</text:p>
          </table:table-cell>
          <table:table-cell office:value-type="float" office:value="10.125" calcext:value-type="float">
            <text:p>10.125</text:p>
          </table:table-cell>
          <table:table-cell table:formula="of:=[.B59]-[.B60]" office:value-type="float" office:value="11.3" calcext:value-type="float">
            <text:p>11.3</text:p>
          </table:table-cell>
          <table:table-cell table:style-name="ce29" table:number-columns-repeated="2"/>
          <table:table-cell table:number-columns-repeated="16377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3.5" calcext:value-type="float">
            <text:p>13.5</text:p>
          </table:table-cell>
          <table:table-cell office:value-type="float" office:value="10.125" calcext:value-type="float">
            <text:p>10.125</text:p>
          </table:table-cell>
          <table:table-cell table:formula="of:=[.B60]-[.B61]" office:value-type="float" office:value="11.2" calcext:value-type="float">
            <text:p>11.2</text:p>
          </table:table-cell>
          <table:table-cell table:style-name="ce29" table:number-columns-repeated="2"/>
          <table:table-cell table:number-columns-repeated="16377"/>
        </table:table-row>
        <table:table-row table:style-name="ro2">
          <table:table-cell/>
          <table:table-cell office:value-type="float" office:value="18.7" calcext:value-type="float">
            <text:p>18.7</text:p>
          </table:table-cell>
          <table:table-cell office:value-type="float" office:value="13.5" calcext:value-type="float">
            <text:p>13.5</text:p>
          </table:table-cell>
          <table:table-cell office:value-type="float" office:value="10.125" calcext:value-type="float">
            <text:p>10.125</text:p>
          </table:table-cell>
          <table:table-cell table:formula="of:=[.B61]-[.B62]" office:value-type="float" office:value="11.3" calcext:value-type="float">
            <text:p>11.3</text:p>
          </table:table-cell>
          <table:table-cell table:style-name="ce29" table:number-columns-repeated="2"/>
          <table:table-cell table:number-columns-repeated="1637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23.49" calcext:value-type="float">
            <text:p>23.49</text:p>
          </table:table-cell>
          <table:table-cell table:formula="of:=[.B62]-[.B63]" office:value-type="float" office:value="18.7" calcext:value-type="float">
            <text:p>18.7</text:p>
          </table:table-cell>
          <table:table-cell table:style-name="ce29" table:number-columns-repeated="2"/>
          <table:table-cell table:number-columns-repeated="16377"/>
        </table:table-row>
        <table:table-row table:style-name="ro2">
          <table:table-cell table:number-columns-repeated="4"/>
          <table:table-cell table:formula="of:=[.B63]-[.B64]"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16377"/>
        </table:table-row>
        <table:table-row table:style-name="ro2">
          <table:table-cell table:number-columns-repeated="2"/>
          <table:table-cell table:formula="of:=[.E61]/[.C62]" office:value-type="float" office:value="0.82962962962963" calcext:value-type="float">
            <text:p>0.82962962962963</text:p>
          </table:table-cell>
          <table:table-cell/>
          <table:table-cell table:formula="of:=[.B64]-[.B65]"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16377"/>
        </table:table-row>
        <table:table-row table:style-name="ro2">
          <table:table-cell/>
          <table:table-cell table:style-name="Default"/>
          <table:table-cell table:style-name="Default" table:formula="of:=[.E62]/[.C63]" office:value-type="float" office:value="0.837037037037037" calcext:value-type="float">
            <text:p>0,837037037037037</text:p>
          </table:table-cell>
          <table:table-cell table:style-name="Default"/>
          <table:table-cell table:formula="of:=[.B65]-[.B66]" office:value-type="float" office:value="0" calcext:value-type="float">
            <text:p>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Default"/>
          <table:table-cell table:style-name="Default" table:formula="of:=([.C65]+[.C66])/2" office:value-type="float" office:value="0.833333333333334" calcext:value-type="float">
            <text:p>0,833333333333334</text:p>
          </table:table-cell>
          <table:table-cell table:style-name="Default"/>
          <table:table-cell table:formula="of:=[.B66]-[.B67]" office:value-type="float" office:value="0" calcext:value-type="float">
            <text:p>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Default" table:number-columns-repeated="3"/>
          <table:table-cell table:formula="of:=[.B67]-[.B68]" office:value-type="float" office:value="0" calcext:value-type="float">
            <text:p>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Default" table:number-columns-repeated="3"/>
          <table:table-cell table:formula="of:=[.B68]-[.B69]" office:value-type="float" office:value="0" calcext:value-type="float">
            <text:p>0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4"/>
          <table:table-cell table:formula="of:=[.B69]-[.B70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formula="of:=[.B70]-[.B71]" office:value-type="float" office:value="0" calcext:value-type="float">
            <text:p>0</text:p>
          </table:table-cell>
          <table:table-cell table:number-columns-repeated="16379"/>
        </table:table-row>
        <table:table-row table:style-name="ro2" table:number-rows-repeated="10485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P0" style:volatile="true">
      <number:number number:decimal-places="1" number:min-decimal-places="1" number:min-integer-digits="1"/>
    </number:number-style>
    <number:number-style style:name="N115">
      <style:text-properties fo:color="#ff0000"/>
      <number:text>-</number:text>
      <number:number number:decimal-places="1" number:min-decimal-places="1" number:min-integer-digits="1"/>
      <style:map style:condition="value()&gt;=0" style:apply-style-name="N115P0"/>
    </number:number-style>
    <number:number-style style:name="N116">
      <number:number number:decimal-places="4" number:min-decimal-places="4" number:min-integer-digits="1"/>
    </number:number-style>
    <number:number-style style:name="N10119" number:language="en" number:country="GB">
      <number:number number:decimal-places="4" number:min-decimal-places="4" number:min-integer-digits="1"/>
    </number:number-style>
    <number:number-style style:name="N10120" number:language="en" number:country="GB">
      <number:number number:decimal-places="10" number:min-decimal-places="10" number:min-integer-digits="1"/>
    </number:number-style>
    <number:number-style style:name="N10121" number:language="en" number:country="GB">
      <number:number number:decimal-places="7" number:min-decimal-places="7" number:min-integer-digits="1"/>
    </number:number-style>
    <number:number-style style:name="N10122" number:language="en" number:country="GB">
      <number:number number:decimal-places="6" number:min-decimal-places="6" number:min-integer-digits="1"/>
    </number:number-style>
    <number:percentage-style style:name="N10123" number:language="en" number:country="GB">
      <number:number number:decimal-places="1" number:min-decimal-places="1" number:min-integer-digits="1"/>
      <number:text>%</number:text>
    </number:percentage-style>
    <number:number-style style:name="N10124" number:language="en" number:country="GB">
      <number:number number:decimal-places="1" number:min-decimal-places="1" number:min-integer-digits="1"/>
    </number:number-style>
    <number:number-style style:name="N10125" number:language="en" number:country="GB">
      <number:number number:decimal-places="3" number:min-decimal-places="3" number:min-integer-digits="1"/>
    </number:number-style>
    <number:percentage-style style:name="N20129" number:language="en" number:country="US">
      <number:number number:decimal-places="1" number:min-decimal-places="1" number:min-integer-digits="1"/>
      <number:text>%</number:text>
    </number:percentage-style>
    <number:number-style style:name="N20130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.00.0000</text:date>, <text:time style:data-style-name="N2" text:time-value="17:33:23.82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36:38.219000000</meta:creation-date>
    <dc:date>2025-01-02T18:17:17.728000000</dc:date>
    <meta:editing-duration>P2DT4H52M</meta:editing-duration>
    <meta:editing-cycles>698</meta:editing-cycles>
    <meta:generator>LibreOffice/24.2.5.2$Windows_X86_64 LibreOffice_project/bffef4ea93e59bebbeaf7f431bb02b1a39ee8a59</meta:generator>
    <meta:document-statistic meta:table-count="1" meta:cell-count="361" meta:object-count="101"/>
  </office:meta>
</office:document-meta>
</file>